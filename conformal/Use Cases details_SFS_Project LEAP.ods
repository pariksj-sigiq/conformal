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4" style:data-style-name="N0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fo:color="#9F9F9F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FFFFFF" fo:border-left="none" fo:border-right="none" style:vertical-align="middle" fo:wrap-option="wrap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5" style:family="table-cell" style:parent-style-name="Heading_32_3" style:data-style-name="N0">
      <style:table-cell-properties fo:border-top="thin solid #FFFFFF" fo:border-bottom="thin solid #FFFFFF" fo:border-left="none" fo:border-right="thin solid #FFFFFF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Heading_32_3" style:data-style-name="N0">
      <style:table-cell-properties fo:border-top="thin solid #FFFFFF" fo:border-bottom="none" fo:border-left="thin solid #FFFFFF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Heading_32_3" style:data-style-name="N0">
      <style:table-cell-properties fo:border="thin solid #FFFFFF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Heading_32_3" style:data-style-name="N0">
      <style:table-cell-properties fo:border-top="thin solid #FFFFFF" fo:border-bottom="none" fo:border-left="thin solid #FFFFFF" fo:border-right="thin solid #FFFFFF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FFFFFF" fo:border-bottom="none" fo:border-left="none" fo:border-right="thin solid #000000" fo:background-color="transparent"/>
    </style:style>
    <style:style style:name="ce20" style:family="table-cell" style:parent-style-name="Default" style:data-style-name="N0">
      <style:table-cell-properties fo:border-top="thin solid #FFFFFF" fo:border-bottom="none" fo:border-left="none" fo:border-right="none" fo:background-color="transparent"/>
    </style:style>
    <style:style style:name="ce21" style:family="table-cell" style:parent-style-name="Default" style:data-style-name="N0">
      <style:table-cell-properties fo:border-top="thin solid #FFFFFF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FFFFFF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24" style:family="table-cell" style:parent-style-name="Heading_32_1" style:data-style-name="N0">
      <style:table-cell-properties fo:border="none" style:vertical-align="top" fo:wrap-option="wrap" fo:background-color="transparent"/>
      <style:text-properties fo:color="#000000" fo:font-size="10pt" style:font-size-asian="10pt" style:font-size-complex="10pt" fo:font-weight="normal" style:font-weight-asian="normal" style:font-weight-complex="normal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29" style:family="table-cell" style:parent-style-name="Commen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Input_58__32_Fact" style:data-style-name="N0">
      <style:table-cell-properties fo:border-top="none" fo:border-bottom="none" fo:border-left="thin solid #000000" fo:border-right="none" style:vertical-align="top" fo:wrap-option="wrap" fo:background-color="transparent" style:cell-protect="non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2" style:family="table-cell" style:parent-style-name="Input_58__32_Fact" style:data-style-name="N0">
      <style:table-cell-properties style:vertical-align="top" fo:wrap-option="wrap" fo:background-color="transparent" style:cell-protect="non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45" style:family="table-cell" style:parent-style-name="Comment" style:data-style-name="N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Input_58__32_Fact" style:data-style-name="N0">
      <style:table-cell-properties fo:border-top="none" fo:border-bottom="thin solid #000000" fo:border-left="thin solid #000000" fo:border-right="none" style:vertical-align="top" fo:wrap-option="wrap" fo:background-color="transparent" style:cell-protect="non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8" style:family="table-cell" style:parent-style-name="Input_58__32_Fact" style:data-style-name="N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wrap-option="wrap" fo:background-color="transparen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1" style:family="table-cell" style:parent-style-name="Default" style:data-style-name="N0">
      <style:table-cell-properties style:vertical-align="automatic" fo:wrap-option="wrap" fo:background-color="transparent"/>
      <style:text-properties fo:color="#353535" fo:font-style="italic" style:font-style-asian="italic" style:font-style-complex="italic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54" style:family="table-cell" style:parent-style-name="Comment" style:data-style-name="N0">
      <style:table-cell-properties fo:border-top="thin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normal" style:font-style-asian="normal" style:font-style-complex="normal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Input_58__32_Fact" style:data-style-name="N0">
      <style:table-cell-properties fo:border-top="thin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7" style:family="table-cell" style:parent-style-name="Input_58__32_Fact" style:data-style-name="N0">
      <style:table-cell-properties fo:border-top="thin solid #000000" fo:border-bottom="none" fo:border-left="none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/>
    </style:style>
    <style:style style:name="ce59" style:family="table-cell" style:parent-style-name="Input_58__32_Fact" style:data-style-name="N0">
      <style:table-cell-properties fo:border-top="thin solid #000000" fo:border-bottom="none" fo:border-left="none" fo:border-right="none" style:vertical-align="to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0" style:family="table-cell" style:parent-style-name="Input_58__32_Fact" style:data-style-name="N0">
      <style:table-cell-properties fo:border-top="thin solid #000000" fo:border-bottom="none" fo:border-left="none" fo:border-right="thin solid #000000" style:vertical-align="to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1" style:family="table-cell" style:parent-style-name="Bad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/>
    </style:style>
    <style:style style:name="ce65" style:family="table-cell" style:parent-style-name="Input_58__32_Fact" style:data-style-name="N0">
      <style:table-cell-properties fo:border-top="thin solid #000000" fo:border-bottom="thin solid #000000" fo:border-left="none" fo:border-right="none" style:vertical-align="to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6" style:family="table-cell" style:parent-style-name="Input_58__32_Fact" style:data-style-name="N0">
      <style:table-cell-properties fo:border-top="thin solid #000000" fo:border-bottom="thin solid #000000" fo:border-left="none" fo:border-right="thin solid #000000" style:vertical-align="to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/>
    </style:style>
    <style:style style:name="ce7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Input_58__32_Fact" style:data-style-name="N0">
      <style:table-cell-properties style:vertical-align="to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74" style:family="table-cell" style:parent-style-name="Input_58__32_Fact" style:data-style-name="N0">
      <style:table-cell-properties fo:border-top="none" fo:border-bottom="none" fo:border-left="none" fo:border-right="thin solid #000000" style:vertical-align="to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fo:color="#000000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  <style:text-properties fo:color="#000000"/>
    </style:style>
    <style:style style:name="ce8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82" style:family="table-cell" style:parent-style-name="Comment" style:data-style-name="N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83" style:family="table-cell" style:parent-style-name="Input_58__32_Fact" style:data-style-name="N0">
      <style:table-cell-properties fo:border-top="none" fo:border-bottom="thin solid #000000" fo:border-left="none" fo:border-right="none" style:vertical-align="top" fo:wrap-option="wrap" fo:background-color="transparent" style:cell-protect="none"/>
      <style:text-properties fo:color="#000000" fo:font-size="12pt" style:font-size-asian="12pt" style:font-size-complex="12pt" fo:font-weight="bold" style:font-weight-asian="bold" style:font-weight-complex="bold"/>
    </style:style>
    <style:style style:name="ce84" style:family="table-cell" style:parent-style-name="Input_58__32_Fact" style:data-style-name="N0">
      <style:table-cell-properties fo:border-top="none" fo:border-bottom="thin solid #000000" fo:border-left="none" fo:border-right="thin solid #000000" style:vertical-align="top" fo:wrap-option="wrap" fo:background-color="transparent" style:cell-protect="none"/>
      <style:text-properties fo:color="#000000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/>
      <style:text-properties fo:color="#000000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90" style:family="table-cell" style:parent-style-name="Heading_32_1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92" style:family="table-cell" style:parent-style-name="Comment" style:data-style-name="N0">
      <style:table-cell-properties fo:border-top="thin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fo:background-color="transparent" style:cell-protect="none"/>
      <style:text-properties fo:color="#000000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fo:background-color="transparent" style:cell-protect="none"/>
      <style:text-properties fo:color="#000000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fo:background-color="transparent" style:cell-protect="none"/>
      <style:text-properties fo:color="#000000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2" style:family="table-cell" style:parent-style-name="Input_58__32_Fact" style:data-style-name="N0">
      <style:table-cell-properties fo:border-top="thin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03" style:family="table-cell" style:parent-style-name="Input_58__32_Fact" style:data-style-name="N0">
      <style:table-cell-properties fo:border-top="thin solid #000000" fo:border-bottom="none" fo:border-left="none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fo:background-color="transparent" style:cell-protect="none"/>
      <style:text-properties fo:color="#000000" fo:font-size="14pt" style:font-size-asian="14pt" style:font-size-complex="14pt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thin solid #000000" fo:background-color="transparent" style:cell-protect="none"/>
      <style:text-properties fo:color="#000000" fo:font-size="14pt" style:font-size-asian="14pt" style:font-size-complex="14pt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fo:background-color="transparent" style:cell-protect="none"/>
      <style:text-properties fo:color="#000000" fo:font-size="14pt" style:font-size-asian="14pt" style:font-size-complex="14pt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 style:cell-protect="none"/>
      <style:text-properties fo:color="#000000" fo:font-size="14pt" style:font-size-asian="14pt" style:font-size-complex="14pt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 fo:background-color="transparent" style:cell-protect="none"/>
      <style:text-properties fo:color="#000000" fo:font-size="14pt" style:font-size-asian="14pt" style:font-size-complex="14pt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  <style:text-properties fo:color="#000000" fo:font-size="14pt" style:font-size-asian="14pt" style:font-size-complex="14pt"/>
    </style:style>
    <style:style style:name="ce113" style:family="table-cell" style:parent-style-name="Input_58__32_Fact" style:data-style-name="N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14" style:family="table-cell" style:parent-style-name="Input_58__32_Fact" style:data-style-name="N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18" style:family="table-cell" style:parent-style-name="Bad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19" style:family="table-cell" style:parent-style-name="Bad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0" style:family="table-cell" style:parent-style-name="Bad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1" style:family="table-cell" style:parent-style-name="Heading_32_1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122" style:family="table-cell" style:parent-style-name="Heading_32_1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26" style:family="table-cell" style:parent-style-name="Heading_32_1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28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/>
    </style:style>
    <style:style style:name="ce129" style:family="table-cell" style:parent-style-name="Good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30" style:family="table-cell" style:parent-style-name="Heading_32_1" style:data-style-name="N0">
      <style:table-cell-properties fo:border="thin solid #000000" style:vertical-align="top" fo:wrap-option="wrap" fo:background-color="transparent"/>
      <style:text-properties fo:color="#000000" fo:font-size="10pt" style:font-size-asian="10pt" style:font-size-complex="10pt" fo:font-weight="normal" style:font-weight-asian="normal" style:font-weight-complex="normal"/>
    </style:style>
    <style:style style:name="ce13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37" style:family="table-cell" style:parent-style-name="Good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38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/>
      <style:text-properties fo:color="#000000"/>
    </style:style>
    <style:style style:name="ce139" style:family="table-cell" style:parent-style-name="Default" style:data-style-name="N0">
      <style:table-cell-properties fo:background-color="transparent"/>
      <style:text-properties fo:color="#000000"/>
    </style:style>
    <style:style style:name="ce140" style:family="table-cell" style:parent-style-name="Heading_32_3" style:data-style-name="N0">
      <style:table-cell-properties fo:border-top="thin solid #FFFFFF" fo:border-bottom="none" fo:border-left="thin solid #FFFFFF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FFFFFF" fo:border-bottom="none" fo:border-left="none" fo:border-right="thin solid #000000" fo:background-color="transparent"/>
      <style:text-properties fo:color="#000000"/>
    </style:style>
    <style:style style:name="ce142" style:family="table-cell" style:parent-style-name="Total" style:data-style-name="N0">
      <style:table-cell-properties fo:border-top="thin solid #000000" fo:border-bottom="none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3" style:family="table-cell" style:parent-style-name="Total" style:data-style-name="N0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4" style:family="table-cell" style:parent-style-name="Total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5" style:family="table-cell" style:parent-style-name="Total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6" style:family="table-cell" style:parent-style-name="Total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000000"/>
    </style:style>
    <style:style style:name="ce148" style:family="table-cell" style:parent-style-name="Total" style:data-style-name="N0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000000"/>
    </style:style>
    <style:style style:name="ce150" style:family="table-cell" style:parent-style-name="Total" style:data-style-name="N0">
      <style:table-cell-properties fo:border-top="thin solid #000000" fo:border-bottom="none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1" style:family="table-cell" style:parent-style-name="Total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2" style:family="table-cell" style:parent-style-name="Total" style:data-style-name="N0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3" style:family="table-cell" style:parent-style-name="Total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4" style:family="table-cell" style:parent-style-name="Heading_32_3" style:data-style-name="N0">
      <style:table-cell-properties fo:border-top="thin solid #FFFFFF" fo:border-bottom="thin solid #FFFFFF" fo:border-left="none" fo:border-right="thin solid #FFFFFF" style:vertical-align="middle" fo:wrap-option="wrap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9" style:family="table-cell" style:parent-style-name="Default" style:data-style-name="N0">
      <style:table-cell-properties fo:background-color="transparent"/>
      <style:text-properties fo:color="#000000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61" style:family="table-cell" style:parent-style-name="Default" style:data-style-name="N0">
      <style:table-cell-properties fo:border-top="thin solid #FFFFFF" fo:border-bottom="none" fo:border-left="none" fo:border-right="none" style:vertical-align="middle" fo:background-color="transparent"/>
      <style:text-properties fo:color="#990000" fo:font-size="12pt" style:font-size-asian="12pt" style:font-size-complex="12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990000"/>
    </style:style>
    <style:style style:name="ce163" style:family="table-cell" style:parent-style-name="Default" style:data-style-name="N0">
      <style:table-cell-properties style:vertical-align="middle" fo:background-color="transparent"/>
      <style:text-properties fo:color="#990000" fo:font-size="12pt" style:font-size-asian="12pt" style:font-size-complex="12pt" fo:font-weight="bold" style:font-weight-asian="bold" style:font-weight-complex="bold"/>
    </style:style>
    <style:style style:name="ce164" style:family="table-cell" style:parent-style-name="Total" style:data-style-name="N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990000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fo:color="#990000" fo:font-size="12pt" style:font-size-asian="12pt" style:font-size-complex="12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fo:color="#990000"/>
    </style:style>
    <style:style style:name="ce16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990000"/>
    </style:style>
    <style:style style:name="ce168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990000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990000"/>
    </style:style>
    <style:style style:name="ce1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71" style:family="table-cell" style:parent-style-name="Default" style:data-style-name="N0">
      <style:table-cell-properties fo:background-color="transparent"/>
      <style:text-properties fo:color="#000000"/>
    </style:style>
    <style:style style:name="ce17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990000"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990000" fo:font-size="12pt" style:font-size-asian="12pt" style:font-size-complex="12pt" fo:font-weight="bold" style:font-weight-asian="bold" style:font-weight-complex="bold"/>
    </style:style>
    <style:style style:name="ce175" style:family="table-cell" style:parent-style-name="Default" style:data-style-name="N0">
      <style:table-cell-properties fo:background-color="transparent"/>
      <style:text-properties fo:color="#990000"/>
    </style:style>
    <style:style style:name="ce17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17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79" style:family="table-cell" style:parent-style-name="Default" style:data-style-name="N0">
      <style:table-cell-properties fo:background-color="transparent"/>
      <style:text-properties fo:color="#000000"/>
    </style:style>
    <style:style style:name="ce180" style:family="table-cell" style:parent-style-name="Default" style:data-style-name="N0">
      <style:table-cell-properties fo:background-color="transparent"/>
      <style:text-properties fo:color="#990000"/>
    </style:style>
    <style:style style:name="ce18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/>
    </style:style>
    <style:style style:name="ce182" style:family="table-cell" style:parent-style-name="Total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8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/>
    </style:style>
    <style:style style:name="ce184" style:family="table-cell" style:parent-style-name="Heading_32_3" style:data-style-name="N0">
      <style:table-cell-properties fo:border="none" style:vertical-align="middle" fo:wrap-option="wrap" fo:background-color="transparent" style:cell-protect="protected" style:repeat-content="false"/>
      <style:paragraph-properties fo:text-align="center"/>
      <style:text-properties fo:color="#990000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8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88" style:family="table-cell" style:parent-style-name="Commen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1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0" style:family="table-cell" style:parent-style-name="Input_58__32_Fac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91" style:family="table-cell" style:parent-style-name="Input_58__32_Fac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fo:color="#990000" fo:font-size="12pt" style:font-size-asian="12pt" style:font-size-complex="12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195" style:family="table-cell" style:parent-style-name="Comment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tyle="normal" style:font-style-asian="normal" style:font-style-complex="normal"/>
    </style:style>
    <style:style style:name="ce1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Input_58__32_Fact" style:data-style-name="N0">
      <style:table-cell-properties fo:border-top="thin solid #000000" fo:border-bottom="none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98" style:family="table-cell" style:parent-style-name="Bad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0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02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none" fo:border-bottom="thin solid #FFFFFF" fo:border-left="none" fo:border-right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9.91305555555556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564444444444444cm"/>
    </style:style>
    <style:style style:name="co5" style:family="table-column">
      <style:table-column-properties fo:break-before="auto" style:column-width="0.776111111111111cm"/>
    </style:style>
    <style:style style:name="co6" style:family="table-column">
      <style:table-column-properties fo:break-before="auto" style:column-width="7.58472222222222cm"/>
    </style:style>
    <style:style style:name="co7" style:family="table-column">
      <style:table-column-properties fo:break-before="auto" style:column-width="9.50736111111111cm"/>
    </style:style>
    <style:style style:name="co8" style:family="table-column">
      <style:table-column-properties fo:break-before="auto" style:column-width="12.54125cm"/>
    </style:style>
    <style:style style:name="co9" style:family="table-column">
      <style:table-column-properties fo:break-before="auto" style:column-width="10.3011111111111cm"/>
    </style:style>
    <style:style style:name="co10" style:family="table-column">
      <style:table-column-properties fo:break-before="auto" style:column-width="12.4177777777778cm"/>
    </style:style>
    <style:style style:name="co11" style:family="table-column">
      <style:table-column-properties fo:break-before="auto" style:column-width="10.795cm"/>
    </style:style>
    <style:style style:name="co12" style:family="table-column">
      <style:table-column-properties fo:break-before="auto" style:column-width="5.82083333333333cm"/>
    </style:style>
    <style:style style:name="co13" style:family="table-column">
      <style:table-column-properties fo:break-before="auto" style:column-width="5.43277777777778cm"/>
    </style:style>
    <style:style style:name="co14" style:family="table-column">
      <style:table-column-properties fo:break-before="auto" style:column-width="12.9293055555556cm"/>
    </style:style>
    <style:style style:name="co15" style:family="table-column">
      <style:table-column-properties fo:break-before="auto" style:column-width="5.11527777777778cm"/>
    </style:style>
    <style:style style:name="co16" style:family="table-column">
      <style:table-column-properties fo:break-before="auto" style:column-width="6.87916666666667cm"/>
    </style:style>
    <style:style style:name="co17" style:family="table-column">
      <style:table-column-properties fo:break-before="auto" style:column-width="3.10444444444444cm"/>
    </style:style>
    <style:style style:name="co18" style:family="table-column">
      <style:table-column-properties fo:break-before="auto" style:column-width="3.96875cm"/>
    </style:style>
    <style:style style:name="co19" style:family="table-column">
      <style:table-column-properties fo:break-before="auto" style:column-width="1.72861111111111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26pt" style:use-optimal-row-height="true" fo:break-before="auto"/>
    </style:style>
    <style:style style:name="ro6" style:family="table-row">
      <style:table-row-properties style:row-height="12.5pt" style:use-optimal-row-height="false" fo:break-before="auto"/>
    </style:style>
    <style:style style:name="ro7" style:family="table-row">
      <style:table-row-properties style:row-height="13pt" style:use-optimal-row-height="false" fo:break-before="auto"/>
    </style:style>
    <style:style style:name="ro8" style:family="table-row">
      <style:table-row-properties style:row-height="11pt" style:use-optimal-row-height="false" fo:break-before="auto"/>
    </style:style>
    <style:style style:name="ro9" style:family="table-row">
      <style:table-row-properties style:row-height="33.65pt" style:use-optimal-row-height="false" fo:break-before="auto"/>
    </style:style>
    <style:style style:name="ro10" style:family="table-row">
      <style:table-row-properties style:row-height="16.25pt" style:use-optimal-row-height="false" fo:break-before="auto"/>
    </style:style>
    <style:style style:name="ro11" style:family="table-row">
      <style:table-row-properties style:row-height="40pt" style:use-optimal-row-height="false" fo:break-before="auto"/>
    </style:style>
    <style:style style:name="ro12" style:family="table-row">
      <style:table-row-properties style:row-height="228pt" style:use-optimal-row-height="true" fo:break-before="auto"/>
    </style:style>
    <style:style style:name="ro13" style:family="table-row">
      <style:table-row-properties style:row-height="203pt" style:use-optimal-row-height="true" fo:break-before="auto"/>
    </style:style>
    <style:style style:name="ro14" style:family="table-row">
      <style:table-row-properties style:row-height="218.5pt" style:use-optimal-row-height="true" fo:break-before="auto"/>
    </style:style>
    <style:style style:name="ro15" style:family="table-row">
      <style:table-row-properties style:row-height="222pt" style:use-optimal-row-height="false" fo:break-before="auto"/>
    </style:style>
    <style:style style:name="ro16" style:family="table-row">
      <style:table-row-properties style:row-height="227pt" style:use-optimal-row-height="true" fo:break-before="auto"/>
    </style:style>
    <style:style style:name="ro17" style:family="table-row">
      <style:table-row-properties style:row-height="230pt" style:use-optimal-row-height="true" fo:break-before="auto"/>
    </style:style>
    <style:style style:name="ro18" style:family="table-row">
      <style:table-row-properties style:row-height="110.4pt" style:use-optimal-row-height="false" fo:break-before="auto"/>
    </style:style>
    <style:style style:name="ro19" style:family="table-row">
      <style:table-row-properties style:row-height="150pt" style:use-optimal-row-height="false" fo:break-before="auto"/>
    </style:style>
    <style:style style:name="ro20" style:family="table-row">
      <style:table-row-properties style:row-height="250.75pt" style:use-optimal-row-height="false" fo:break-before="auto"/>
    </style:style>
    <style:style style:name="ro21" style:family="table-row">
      <style:table-row-properties style:row-height="254pt" style:use-optimal-row-height="true" fo:break-before="auto"/>
    </style:style>
    <style:style style:name="ro22" style:family="table-row">
      <style:table-row-properties style:row-height="179.5pt" style:use-optimal-row-height="true" fo:break-before="auto"/>
    </style:style>
    <style:style style:name="ro23" style:family="table-row">
      <style:table-row-properties style:row-height="151.5pt" style:use-optimal-row-height="true" fo:break-before="auto"/>
    </style:style>
    <style:style style:name="ro24" style:family="table-row">
      <style:table-row-properties style:row-height="164.5pt" style:use-optimal-row-height="true" fo:break-before="auto"/>
    </style:style>
    <style:style style:name="ro25" style:family="table-row">
      <style:table-row-properties style:row-height="239pt" style:use-optimal-row-height="true" fo:break-before="auto"/>
    </style:style>
    <style:style style:name="ro26" style:family="table-row">
      <style:table-row-properties style:row-height="239.5pt" style:use-optimal-row-height="true" fo:break-before="auto"/>
    </style:style>
    <style:style style:name="ro27" style:family="table-row">
      <style:table-row-properties style:row-height="152.5pt" style:use-optimal-row-height="true" fo:break-before="auto"/>
    </style:style>
    <style:style style:name="ro28" style:family="table-row">
      <style:table-row-properties style:row-height="101pt" style:use-optimal-row-height="true" fo:break-before="auto"/>
    </style:style>
    <style:style style:name="ro29" style:family="table-row">
      <style:table-row-properties style:row-height="122pt" style:use-optimal-row-height="false" fo:break-before="auto"/>
    </style:style>
    <style:style style:name="ro30" style:family="table-row">
      <style:table-row-properties style:row-height="119.4pt" style:use-optimal-row-height="false" fo:break-before="auto"/>
    </style:style>
    <style:style style:name="ro31" style:family="table-row">
      <style:table-row-properties style:row-height="126pt" style:use-optimal-row-height="true" fo:break-before="auto"/>
    </style:style>
    <style:style style:name="ro32" style:family="table-row">
      <style:table-row-properties style:row-height="35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00000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_Case_List" table:style-name="ta1">
        <table:table-column table:style-name="co1" table:default-cell-style-name="ce170"/>
        <table:table-column table:style-name="co2" table:default-cell-style-name="ce17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74">
            <text:p>Enterprise Chatbot</text:p>
          </table:table-cell>
          <table:table-cell office:value-type="string" table:style-name="ce184">
            <text:p>Use Case Name</text:p>
          </table:table-cell>
          <table:table-cell table:number-columns-repeated="16382"/>
        </table:table-row>
        <table:table-row table:style-name="ro3">
          <table:table-cell office:value-type="float" office:value="1" table:style-name="ce177">
            <text:p>1</text:p>
          </table:table-cell>
          <table:table-cell office:value-type="string" table:style-name="ce145">
            <text:p>Enterprise Chat Assista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72">
            <text:p>PROCUREMENT</text:p>
          </table:table-cell>
          <table:table-cell table:style-name="ce171"/>
          <table:table-cell table:number-columns-repeated="16382"/>
        </table:table-row>
        <table:table-row table:style-name="ro4">
          <table:table-cell office:value-type="float" office:value="1" table:style-name="ce173">
            <text:p>1</text:p>
          </table:table-cell>
          <table:table-cell office:value-type="string" table:style-name="ce145">
            <text:p>Historical Spend Analysis &amp; Price Insights</text:p>
          </table:table-cell>
          <table:table-cell table:number-columns-repeated="16382"/>
        </table:table-row>
        <table:table-row table:style-name="ro4">
          <table:table-cell office:value-type="float" office:value="2" table:style-name="ce173">
            <text:p>2</text:p>
          </table:table-cell>
          <table:table-cell office:value-type="string" table:style-name="ce145">
            <text:p>Real-Time Import Data Analysis</text:p>
          </table:table-cell>
          <table:table-cell table:number-columns-repeated="16382"/>
        </table:table-row>
        <table:table-row table:style-name="ro4">
          <table:table-cell office:value-type="float" office:value="3" table:style-name="ce173">
            <text:p>3</text:p>
          </table:table-cell>
          <table:table-cell office:value-type="string" table:style-name="ce145">
            <text:p>AI-Driven Preparation Material for Negotiations</text:p>
          </table:table-cell>
          <table:table-cell table:number-columns-repeated="16382"/>
        </table:table-row>
        <table:table-row table:style-name="ro4">
          <table:table-cell office:value-type="float" office:value="4" table:style-name="ce173">
            <text:p>4</text:p>
          </table:table-cell>
          <table:table-cell office:value-type="string" table:style-name="ce145">
            <text:p>AI-Led Vendor Identification &amp; Recommendation</text:p>
          </table:table-cell>
          <table:table-cell table:number-columns-repeated="16382"/>
        </table:table-row>
        <table:table-row table:style-name="ro4">
          <table:table-cell office:value-type="float" office:value="5" table:style-name="ce173">
            <text:p>5</text:p>
          </table:table-cell>
          <table:table-cell office:value-type="string" table:style-name="ce145">
            <text:p>Vendor Creditworthiness &amp; Fraud Check</text:p>
          </table:table-cell>
          <table:table-cell table:number-columns-repeated="16382"/>
        </table:table-row>
        <table:table-row table:style-name="ro5">
          <table:table-cell office:value-type="float" office:value="6" table:style-name="ce173">
            <text:p>6</text:p>
          </table:table-cell>
          <table:table-cell office:value-type="string" table:style-name="ce145">
            <text:p>AI-Driven Should-Cost Analysis<text:s/></text:p>
            <text:p><text:span text:style-name="T4">(across the top 5-10 products)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74">
            <text:p>FIELD FORCE (MGOs) + SALESFORCE</text:p>
          </table:table-cell>
          <table:table-cell table:style-name="ce175"/>
          <table:table-cell table:number-columns-repeated="16382"/>
        </table:table-row>
        <table:table-row table:style-name="ro4">
          <table:table-cell office:value-type="float" office:value="1" table:style-name="ce176">
            <text:p>1</text:p>
          </table:table-cell>
          <table:table-cell office:value-type="string" table:style-name="ce145">
            <text:p>Field Performance Tracking Dashboard</text:p>
          </table:table-cell>
          <table:table-cell table:number-columns-repeated="16382"/>
        </table:table-row>
        <table:table-row table:style-name="ro4">
          <table:table-cell office:value-type="float" office:value="2" table:style-name="ce176">
            <text:p>2</text:p>
          </table:table-cell>
          <table:table-cell office:value-type="string" table:style-name="ce145">
            <text:p>Activity Analytics (Growthbook + SAP)</text:p>
          </table:table-cell>
          <table:table-cell table:number-columns-repeated="16382"/>
        </table:table-row>
        <table:table-row table:style-name="ro4">
          <table:table-cell office:value-type="float" office:value="3" table:style-name="ce176">
            <text:p>3</text:p>
          </table:table-cell>
          <table:table-cell office:value-type="string" table:style-name="ce145">
            <text:p>Pricing, Policy &amp; Scheme Dissemination Chatbot</text:p>
          </table:table-cell>
          <table:table-cell table:number-columns-repeated="16382"/>
        </table:table-row>
        <table:table-row table:style-name="ro4">
          <table:table-cell office:value-type="float" office:value="4" table:style-name="ce176">
            <text:p>4</text:p>
          </table:table-cell>
          <table:table-cell office:value-type="string" table:style-name="ce145">
            <text:p>Dealer Profiles &amp; Field-Visit Conversation Inputs</text:p>
          </table:table-cell>
          <table:table-cell table:number-columns-repeated="16382"/>
        </table:table-row>
        <table:table-row table:style-name="ro4">
          <table:table-cell office:value-type="float" office:value="5" table:style-name="ce176">
            <text:p>5</text:p>
          </table:table-cell>
          <table:table-cell office:value-type="string" table:style-name="ce145">
            <text:p>AI-Enabled Sales Coaching</text:p>
          </table:table-cell>
          <table:table-cell table:number-columns-repeated="16382"/>
        </table:table-row>
        <table:table-row table:style-name="ro4">
          <table:table-cell office:value-type="float" office:value="6" table:style-name="ce176">
            <text:p>6</text:p>
          </table:table-cell>
          <table:table-cell office:value-type="string" table:style-name="ce145">
            <text:p>Unified Product &amp; Partner-Level Visibility</text:p>
          </table:table-cell>
          <table:table-cell table:number-columns-repeated="16382"/>
        </table:table-row>
        <table:table-row table:style-name="ro4">
          <table:table-cell office:value-type="float" office:value="7" table:style-name="ce176">
            <text:p>7</text:p>
          </table:table-cell>
          <table:table-cell office:value-type="string" table:style-name="ce145">
            <text:p>Real-Time Warehouse Stock Visibility</text:p>
          </table:table-cell>
          <table:table-cell table:number-columns-repeated="16382"/>
        </table:table-row>
        <table:table-row table:style-name="ro4">
          <table:table-cell office:value-type="float" office:value="8" table:style-name="ce176">
            <text:p>8</text:p>
          </table:table-cell>
          <table:table-cell office:value-type="string" table:style-name="ce145">
            <text:p>Early Warning for Sales Performance &amp; Dealer Churn Risk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78"/>
          <table:table-cell table:style-name="ce179"/>
          <table:table-cell table:number-columns-repeated="16382"/>
        </table:table-row>
        <table:table-row table:style-name="ro2">
          <table:table-cell office:value-type="string" table:style-name="ce174">
            <text:p>LOGISTICS - BUY AND CUSTOMIZE</text:p>
          </table:table-cell>
          <table:table-cell table:style-name="ce180"/>
          <table:table-cell table:number-columns-repeated="16382"/>
        </table:table-row>
        <table:table-row table:style-name="ro6">
          <table:table-cell office:value-type="float" office:value="1" table:style-name="ce181">
            <text:p>1</text:p>
          </table:table-cell>
          <table:table-cell office:value-type="string" table:style-name="ce182">
            <text:p>Freight Price Discovery</text:p>
            <text:p/>
          </table:table-cell>
          <table:table-cell table:number-columns-repeated="16382"/>
        </table:table-row>
        <table:table-row table:style-name="ro7">
          <table:table-cell office:value-type="float" office:value="2" table:style-name="ce181">
            <text:p>2</text:p>
          </table:table-cell>
          <table:table-cell office:value-type="string" table:style-name="ce182">
            <text:p>Optimal Route &amp; Pickup/Drop Recommendation</text:p>
            <text:p/>
          </table:table-cell>
          <table:table-cell table:number-columns-repeated="16382"/>
        </table:table-row>
        <table:table-row table:style-name="ro6">
          <table:table-cell office:value-type="float" office:value="3" table:style-name="ce181">
            <text:p>3</text:p>
          </table:table-cell>
          <table:table-cell office:value-type="string" table:style-name="ce182">
            <text:p>E-Proof of Delivery (E-PoD) Execution</text:p>
            <text:p/>
          </table:table-cell>
          <table:table-cell table:number-columns-repeated="16382"/>
        </table:table-row>
        <table:table-row table:style-name="ro8">
          <table:table-cell office:value-type="float" office:value="4" table:style-name="ce181">
            <text:p>4</text:p>
          </table:table-cell>
          <table:table-cell office:value-type="string" table:style-name="ce182">
            <text:p>Real-Time Consignment Monitoring</text:p>
            <text:p/>
          </table:table-cell>
          <table:table-cell table:number-columns-repeated="16382"/>
        </table:table-row>
        <table:table-row table:style-name="ro5">
          <table:table-cell office:value-type="float" office:value="5" table:style-name="ce181">
            <text:p>5</text:p>
          </table:table-cell>
          <table:table-cell office:value-type="string" table:style-name="ce182">
            <text:p>Ocean Freight Tracking &amp; Optimization</text:p>
            <text:p/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74">
            <text:p>TECHNOLOGY &amp; INFRASTRUCTURE SETUP</text:p>
          </table:table-cell>
          <table:table-cell table:style-name="ce171"/>
          <table:table-cell table:number-columns-repeated="16382"/>
        </table:table-row>
        <table:table-row table:style-name="ro3">
          <table:table-cell office:value-type="float" office:value="1" table:style-name="ce183">
            <text:p>1</text:p>
          </table:table-cell>
          <table:table-cell office:value-type="string" table:style-name="ce145">
            <text:p>Technology and Infrastructure set-up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Use_Case_Details" table:style-name="ta2">
        <table:table-column table:style-name="co4" table:number-columns-repeated="2" table:default-cell-style-name="ce3"/>
        <table:table-column table:style-name="co5" table:default-cell-style-name="ce139"/>
        <table:table-column table:style-name="co6" table:default-cell-style-name="ce139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 table:visibility="collapse"/>
        <table:table-column table:style-name="co13" table:default-cell-style-name="ce3" table:visibility="collapse"/>
        <table:table-column table:style-name="co14" table:default-cell-style-name="ce3"/>
        <table:table-column table:style-name="co15" table:default-cell-style-name="ce3" table:visibility="collapse"/>
        <table:table-column table:style-name="co16" table:default-cell-style-name="ce3" table:visibility="collapse"/>
        <table:table-column table:style-name="co17" table:default-cell-style-name="ce3" table:visibility="collapse"/>
        <table:table-column table:style-name="co18" table:default-cell-style-name="ce3" table:visibility="collapse"/>
        <table:table-column table:style-name="co19" table:number-columns-repeated="16368" table:default-cell-style-name="ce3"/>
        <table:table-row table:style-name="ro9">
          <table:table-cell table:number-columns-repeated="2"/>
          <table:table-cell table:number-columns-repeated="2" table:style-name="ce139"/>
          <table:table-cell table:number-columns-repeated="2" table:style-name="ce3"/>
          <table:table-cell table:style-name="ce4"/>
          <table:table-cell table:number-columns-repeated="3" table:style-name="ce3"/>
          <table:table-cell table:style-name="ce5"/>
          <table:table-cell table:style-name="ce3"/>
          <table:table-cell office:value-type="string" table:number-columns-spanned="2" table:number-rows-spanned="1" table:style-name="ce6">
            <text:p>Overall leadership/ partner allocation time not included;</text:p>
            <text:p>Additional effort allocation of design team on infra development<text:s/></text:p>
          </table:table-cell>
          <table:covered-table-cell/>
          <table:table-cell table:number-columns-repeated="16370" table:style-name="ce3"/>
        </table:table-row>
        <table:table-row table:style-name="ro10">
          <table:table-cell table:number-columns-repeated="2" table:style-name="ce14"/>
          <table:table-cell table:number-columns-spanned="2" table:number-rows-spanned="1" table:style-name="ce203"/>
          <table:covered-table-cell/>
          <table:table-cell office:value-type="string" table:style-name="ce10">
            <text:p>Use case definition</text:p>
          </table:table-cell>
          <table:table-cell office:value-type="string" table:number-columns-spanned="2" table:number-rows-spanned="1" table:style-name="ce11">
            <text:p>SFS Point of Departure (current state)</text:p>
          </table:table-cell>
          <table:covered-table-cell/>
          <table:table-cell office:value-type="string" table:number-columns-spanned="2" table:number-rows-spanned="1" table:style-name="ce12">
            <text:p>SFS Point of Arrival (envisioned future state)</text:p>
          </table:table-cell>
          <table:covered-table-cell/>
          <table:table-cell office:value-type="string" table:number-columns-spanned="2" table:number-rows-spanned="1" table:style-name="ce12">
            <text:p>Solution Theme Impact</text:p>
          </table:table-cell>
          <table:covered-table-cell/>
          <table:table-cell office:value-type="string" table:number-columns-spanned="3" table:number-rows-spanned="1" table:style-name="ce12">
            <text:p>Effort Estimation</text:p>
          </table:table-cell>
          <table:covered-table-cell table:number-columns-repeated="2"/>
          <table:table-cell office:value-type="string" table:number-columns-spanned="2" table:number-rows-spanned="1" table:style-name="ce12">
            <text:p>Cost (Solution-Level)</text:p>
          </table:table-cell>
          <table:covered-table-cell/>
          <table:table-cell table:number-columns-repeated="16368" table:style-name="ce14"/>
        </table:table-row>
        <table:table-row table:style-name="ro11">
          <table:table-cell table:number-columns-repeated="2" table:style-name="ce14"/>
          <table:table-cell office:value-type="string" table:style-name="ce154">
            <text:p>#</text:p>
          </table:table-cell>
          <table:table-cell office:value-type="string" table:style-name="ce140">
            <text:p>Use Case Name</text:p>
          </table:table-cell>
          <table:table-cell office:value-type="string" table:style-name="ce15">
            <text:p>1. Use Case Definition</text:p>
          </table:table-cell>
          <table:table-cell office:value-type="string" table:style-name="ce17">
            <text:p>2. Current Way of Working and Concerns</text:p>
          </table:table-cell>
          <table:table-cell office:value-type="string" table:style-name="ce16">
            <text:p>3. Complications</text:p>
          </table:table-cell>
          <table:table-cell office:value-type="string" table:style-name="ce15">
            <text:p>4. Revised Way of Working</text:p>
          </table:table-cell>
          <table:table-cell office:value-type="string" table:style-name="ce18">
            <text:p>5. Use Case Benefit</text:p>
          </table:table-cell>
          <table:table-cell office:value-type="string" table:style-name="ce17">
            <text:p>6a Strategic Impact</text:p>
          </table:table-cell>
          <table:table-cell office:value-type="string" table:style-name="ce16">
            <text:p>6b Financial Impact</text:p>
          </table:table-cell>
          <table:table-cell office:value-type="string" table:style-name="ce15">
            <text:p>7. Key Activities</text:p>
          </table:table-cell>
          <table:table-cell office:value-type="string" table:style-name="ce17">
            <text:p>8. Effort allocation: Design + PMO team</text:p>
            <text:p>(at a solution level)</text:p>
          </table:table-cell>
          <table:table-cell office:value-type="string" table:style-name="ce16">
            <text:p>9. Effort allocation: Development</text:p>
            <text:p>(5 member tech team)</text:p>
          </table:table-cell>
          <table:table-cell office:value-type="string" table:style-name="ce15">
            <text:p>10. Cost of Design</text:p>
            <text:p>(INR Cr)</text:p>
          </table:table-cell>
          <table:table-cell office:value-type="string" table:style-name="ce18">
            <text:p>11. Cost of Development</text:p>
            <text:p>(INR Cr)</text:p>
          </table:table-cell>
          <table:table-cell table:number-columns-repeated="16368" table:style-name="ce14"/>
        </table:table-row>
        <table:table-row table:style-name="ro2">
          <table:table-cell table:number-columns-repeated="2" table:style-name="ce14"/>
          <table:table-cell office:value-type="string" table:style-name="ce161">
            <text:p>PROCUREMENT</text:p>
          </table:table-cell>
          <table:table-cell table:style-name="ce141"/>
          <table:table-cell table:number-columns-repeated="2" table:style-name="ce20"/>
          <table:table-cell table:style-name="ce19"/>
          <table:table-cell table:style-name="ce20"/>
          <table:table-cell table:style-name="ce19"/>
          <table:table-cell table:number-columns-spanned="2" table:number-rows-spanned="1" table:style-name="ce12"/>
          <table:covered-table-cell/>
          <table:table-cell table:number-columns-spanned="3" table:number-rows-spanned="1" table:style-name="ce202"/>
          <table:covered-table-cell table:number-columns-repeated="2"/>
          <table:table-cell table:style-name="ce10"/>
          <table:table-cell table:style-name="ce22"/>
          <table:table-cell table:number-columns-repeated="16368" table:style-name="ce14"/>
        </table:table-row>
        <table:table-row table:style-name="ro12">
          <table:table-cell table:number-columns-repeated="2"/>
          <table:table-cell office:value-type="float" office:value="1" table:style-name="ce23">
            <text:p>1</text:p>
          </table:table-cell>
          <table:table-cell office:value-type="string" table:style-name="ce142">
            <text:p>Historical Spend Analysis &amp; Price Insights</text:p>
          </table:table-cell>
          <table:table-cell office:value-type="string" table:style-name="ce130">
            <text:p>• Analyzes multi-year purchase<text:s/><text:span text:style-name="T2">data to identify price variation trends by SKU</text:span>,<text:s/><text:span text:style-name="T2">vendor, and time period and builds a spend cube</text:span><text:s/>(category × vendor × region × time) for the system to uncover spend patterns and anomalies and identify savings opportunities</text:p>
            <text:p><text:span text:style-name="T2">• System driven categorization of spends into multiple categories/ sub-categories</text:span><text:s/>to ensure more depth of analysis<text:s text:c="2"/></text:p>
            <text:p>•<text:s/><text:span text:style-name="T2">Supports BPV (Best Price Vendor) identification<text:s/></text:span>by comparing purchase history of similar products from different vendors across BUs</text:p>
          </table:table-cell>
          <table:table-cell office:value-type="string" table:style-name="ce25">
            <text:p>• No real-time analytical engine on SAP data, all analysis currently done is post-facto</text:p>
            <text:p>• Any spend analysis =<text:span text:style-name="T2"><text:s/>3–5 days of manual Excel work</text:span><text:s/>per quarter per analyst</text:p>
            <text:p>•<text:s/><text:span text:style-name="T2">No spend cube</text:span>: no single view of spend by category × vendor × region × time and/or categorization of spends into meaningful categories</text:p>
            <text:p>•<text:s/><text:span text:style-name="T2">Price variation goes undetected:<text:s/></text:span>same product bought at INR 352/kg from one vendor and INR 460/kg from another in the same month (e.g., Pretilachlor Technical) — no alert, no review</text:p>
            <text:p>•<text:s/><text:span text:style-name="T2">Leadership has zero self-serve analytics<text:s/></text:span>access</text:p>
          </table:table-cell>
          <table:table-cell office:value-type="string" table:style-name="ce131">
            <text:p><text:span text:style-name="T2">Data and Analytics gaps:</text:span></text:p>
            <text:p>•<text:s/><text:span text:style-name="T2">SAP transactions are at PO line-item level<text:s/></text:span>— no tagging by spend category, sub-category, or strategic classification (eg: freight data)</text:p>
            <text:p>• No system driven link between<text:s/><text:span text:style-name="T2">procurement data and commodity price indices</text:span></text:p>
            <text:p/>
            <text:p><text:span text:style-name="T2">Tool fragmentation:</text:span></text:p>
            <text:p>•<text:span text:style-name="T2"><text:s/>All procurement analytics done in Excel using SAP data</text:span><text:s/>— no dashboard, no alerting, no self-serve</text:p>
            <text:p>•<text:s/><text:span text:style-name="T2">Complinity<text:s/></text:span><text:span text:style-name="T3">(vendor license management)</text:span><text:span text:style-name="T2"><text:s/>and Concur<text:s/></text:span><text:span text:style-name="T3">(expense tracking)</text:span><text:span text:style-name="T2"><text:s/>not integrated with SAP</text:span>: SG&amp;A spend tracked separately</text:p>
            <text:p/>
          </table:table-cell>
          <table:table-cell office:value-type="string" table:style-name="ce25">
            <text:p>•<text:s/><text:span text:style-name="T2">Spend Intelligence dashboard<text:s/></text:span>— auto-refreshed spend cube across all categories, vendors, regions, time periods</text:p>
            <text:p>•<text:s/><text:span text:style-name="T2">Sourcing team and leadership to do historical analysis<text:s/></text:span>on a real-time basis and course correct pro-actively vs waiting for annual budget</text:p>
            <text:p>•<text:s/><text:span text:style-name="T2">Weekly automated insight</text:span>: 'Product X 50% WP: 3 vendors used, price range INR 11–20/kg. Cheapest vendor used for only 40% of volume. Estimated leakage: INR 0.4 Cr'</text:p>
            <text:p>•<text:s/><text:span text:style-name="T2">Auto-generated monthly leadership report</text:span>: spend by category vs. prior period, BPV adherence rate, top 5 anomalies, estimated leakage</text:p>
            <text:p>•<text:s/><text:span text:style-name="T2">Leadership to use dashboard live in vendor reviews<text:s/></text:span>to challenge unjustified price increases</text:p>
          </table:table-cell>
          <table:table-cell office:value-type="string" table:style-name="ce26">
            <text:p>•<text:s/><text:span text:style-name="T2">Eliminates manual analysis<text:s/></text:span>— converted to a real-time always-on dashboard</text:p>
            <text:p>•<text:s/><text:span text:style-name="T2">Quantifies Best Price vendor leakage<text:s/></text:span>previously invisible</text:p>
            <text:p>•<text:s/><text:span text:style-name="T2">Enhanced tracking of procurement KPIs:</text:span><text:s/>eg: BPV adherence rate, price consistency index, spend concentration etc.</text:p>
            <text:p>•<text:s/><text:span text:style-name="T2">Audit trail for every price paid<text:s/></text:span>— improves governance and accountability</text:p>
            <text:p>•<text:s/><text:span text:style-name="T2">Improved budget planning and forecasting accuracy</text:span></text:p>
            <text:p>• Stronger leadership control via<text:s/><text:span text:style-name="T2">self-serve analytics</text:span></text:p>
            <text:p/>
          </table:table-cell>
          <table:table-cell office:value-type="string" table:number-columns-spanned="1" table:number-rows-spanned="6" table:style-name="ce43">
            <text:p>• Improved<text:s/><text:span text:style-name="T2">sourcing resilience and supply continuity</text:span></text:p>
            <text:p>•<text:span text:style-name="T2"><text:s/>Faster procurement cycles</text:span><text:s/>and increased team productivity</text:p>
            <text:p>•<text:s/><text:span text:style-name="T2">Stronger governance and auditability</text:span><text:s/>(e.g., reduced vendor default risk)</text:p>
          </table:table-cell>
          <table:table-cell office:value-type="string" table:number-columns-spanned="1" table:number-rows-spanned="6" table:style-name="ce44">
            <text:p><text:span text:style-name="T2">Annualized sourcing savings:</text:span><text:s/>2–3% of addressable spends (55% of total spends of ~1.2K Cr)</text:p>
            <text:p>i.e., INR 10–15 Cr</text:p>
          </table:table-cell>
          <table:table-cell office:value-type="string" table:style-name="ce25">
            <text:p><text:span text:style-name="T2">Data collation:</text:span></text:p>
            <text:p>• SAP purchase register: 3-year extract, line-item level, all categories</text:p>
            <text:p>• Taxonomy mapping: standardize product descriptions, build category hierarchy (category → sub-category → SKU)</text:p>
            <text:p>• Vendor master cleansing: deduplicate names, standardize IDs · Complinity integration</text:p>
            <text:p><text:span text:style-name="T2"/></text:p>
            <text:p><text:span text:style-name="T2">Design:</text:span></text:p>
            <text:p>• Spend cube structure: dimensions (category, vendor, region, time) + measures (volume, value, price/unit, BPV gap)</text:p>
            <text:p>•<text:s/><text:span text:style-name="T2">Anomaly detection rules:<text:s/></text:span>price variance threshold, BPV deviation threshold, concentration alerts</text:p>
            <text:p>• NL query interface scope + monthly auto-report template</text:p>
            <text:p>• Spend taxonomy design and master data harmonization</text:p>
            <text:p><text:span text:style-name="T2"/></text:p>
            <text:p><text:span text:style-name="T2">Development:</text:span></text:p>
            <text:p>• SAP ETL pipeline → data lake · Spend cube computation engine · Anomaly detection model</text:p>
          </table:table-cell>
          <table:table-cell office:value-type="string" table:number-columns-spanned="1" table:number-rows-spanned="6" table:style-name="ce45">
            <text:p>M+2/3 team for complete 6 months with staggered allocations basis effort required</text:p>
            <text:p/>
            <text:p><text:span text:style-name="T4">(40-50% allocation during design phase and slowly tapering down to 10-15% allocation during POC and MVP stage)</text:span></text:p>
          </table:table-cell>
          <table:table-cell office:value-type="string" table:style-name="ce30">
            <text:p>20-25% allocation</text:p>
          </table:table-cell>
          <table:table-cell office:value-type="string" table:number-columns-spanned="1" table:number-rows-spanned="6" table:style-name="ce47">
            <text:p>INR 3.5 Cr</text:p>
            <text:p>(solution level)</text:p>
          </table:table-cell>
          <table:table-cell office:value-type="string" table:number-columns-spanned="1" table:number-rows-spanned="6" table:style-name="ce48">
            <text:p>INR 4.0 Cr</text:p>
            <text:p>(solution level)</text:p>
          </table:table-cell>
          <table:table-cell table:number-columns-repeated="16368" table:style-name="ce3"/>
        </table:table-row>
        <table:table-row table:style-name="ro13">
          <table:table-cell table:number-columns-repeated="2"/>
          <table:table-cell office:value-type="float" office:value="2" table:style-name="ce23">
            <text:p>2</text:p>
          </table:table-cell>
          <table:table-cell office:value-type="string" table:style-name="ce143">
            <text:p>Real-Time Import Data Analysis</text:p>
          </table:table-cell>
          <table:table-cell office:value-type="string" table:style-name="ce24">
            <text:p>•<text:span text:style-name="T2"><text:s/>Pulls and analyzes EXIM / customs data across HSN codes</text:span><text:s/>to surface real-time import price trends and top global suppliers; EXIM data sourced from third-party vendors with an analytics/ intelligence layer build on top of it</text:p>
            <text:p>•<text:s/><text:span text:style-name="T2">Benchmarks SFS purchase prices vs. import parity</text:span><text:s/>(CIF / landed cost) to quantify trader premiums by SKU</text:p>
            <text:p>•<text:s/><text:span text:style-name="T2">Tracks monthly shifts in supplier share</text:span>, import volumes, and country-of-origin pricing dynamics</text:p>
            <text:p>•<text:s/><text:span text:style-name="T2">Provides near real-time alerts<text:s/></text:span>on any large imports/ trades made by other players</text:p>
            <text:p>• Similar dataset used in other use-cases as well to provide a holistic output across use-cases (eg: Vendor negotiation script leveraging import price changes</text:p>
            <text:p/>
          </table:table-cell>
          <table:table-cell office:value-type="string" table:style-name="ce131">
            <text:p>•<text:s/><text:span text:style-name="T2">EXIM data publicly available<text:s/></text:span>but accessed on an ad-hoc basis as per requirement -<text:s/><text:span text:style-name="T2">time intensive activity to generate insights</text:span></text:p>
            <text:p>•<text:s/><text:span text:style-name="T2">Buyers rely entirely on vendor quotes and informal market intelligence</text:span><text:s/>(vendor conversations, WhatsApp, trade bodies)</text:p>
            <text:p>•<text:s/><text:span text:style-name="T2">Price benchmarking, when it happens, is a one-off manual exercise<text:s/></text:span>— not a standard process</text:p>
            <text:p>•<text:s/><text:span text:style-name="T2">No automated alerts for anomalies<text:s/></text:span>in import data<text:s/><text:span text:style-name="T3">(eg: avg monthly purchase of product X is 500kgs and last month it was 1500kgs)</text:span></text:p>
          </table:table-cell>
          <table:table-cell office:value-type="string" table:style-name="ce131">
            <text:p><text:span text:style-name="T2">Data and Analytics gaps:</text:span></text:p>
            <text:p>•<text:s/><text:span text:style-name="T2">Price acceptance decisions made without knowing import price</text:span><text:span text:style-name="T5"><text:s/>patterns<text:s/></text:span><text:span text:style-name="T6">— vendor quotes accepted without a benchmark on avg. import price, avg import quantity, price variation etc.<text:s/></text:span></text:p>
            <text:p>•<text:span text:style-name="T2"><text:s/>No visibility on top global suppliers by product</text:span><text:s/>— lowest-cost source countries are unknown</text:p>
            <text:p>• Even if pulled manually,<text:s/><text:span text:style-name="T2">EXIM data on specific products/ raw materials<text:s/></text:span>cannot be matched to SFS purchase records, and product master without a mapping layer/ manual intervention</text:p>
            <text:p/>
            <text:p><text:span text:style-name="T2">Tool fragmentation:</text:span></text:p>
            <text:p>• EXIM data, SAP records, and commodity prices sit in <text:s/>silos — no connection exists</text:p>
          </table:table-cell>
          <table:table-cell office:value-type="string" table:style-name="ce25">
            <text:p>• Category manager opens<text:s/><text:span text:style-name="T2">Import Intelligence dashboard</text:span>, selects a product → sees: current import price, top 5 source countries, largest importers, and SFS's last 6 purchase prices vs. benchmark — in one view -<text:s/><text:span text:style-name="T5">based on this, the category manager can now take informed decisions on right timing, price and quantity</text:span></text:p>
            <text:p>•<text:s/><text:span text:style-name="T2">Weekly alert on price changes and large transactions</text:span><text:span text:style-name="T7">:</text:span><text:span text:style-name="T3"><text:s/>'Raw material ABC's EXIM benchmark dropped 8% MoM. Last SFS purchase was 19% above benchmark — trigger competitive RFQ before next order; Company X has made a significant purchase of commodity Y which is X% greater than industry average, I should adjust my sourcing for next month by Y%'<text:s/></text:span></text:p>
            <text:p>•<text:s/><text:span text:style-name="T2">Feeds into vendor negotiation script and inputs</text:span>: 'Landed import cost for this product is X — your quote implies a Y% premium. We will pay X + logistics + reasonable margin</text:p>
            <text:p/>
          </table:table-cell>
          <table:table-cell office:value-type="string" table:style-name="ce26">
            <text:p>•<text:span text:style-name="T2"><text:s/>Eliminates information asymmetry with traders</text:span><text:s/>— SFS shifts from price-taker to benchmarked buyer</text:p>
            <text:p>•<text:span text:style-name="T2"><text:s/>Eliminates timing bias<text:s/></text:span>in making sourcing decisions</text:p>
            <text:p>• Enables direct manufacturer sourcing for high-volume SKUs — bypasses trader markup entirely</text:p>
            <text:p>•<text:s/><text:span text:style-name="T2">EXIM price becomes a credible</text:span>, regulation-sourced floor for all vendor discussions</text:p>
            <text:p>•<text:s/><text:span text:style-name="T2">Near real time alerts on any irregular large transactions</text:span><text:s/>made for specific raw material/ commodities</text:p>
            <text:p>•<text:s/><text:span text:style-name="T2">Early warning on global supply shifts / disruptions</text:span></text:p>
          </table:table-cell>
          <table:covered-table-cell/>
          <table:covered-table-cell/>
          <table:table-cell office:value-type="string" table:style-name="ce25">
            <text:p><text:span text:style-name="T2">Data collation/ sourcing</text:span>:</text:p>
            <text:p>•<text:s/><text:span text:style-name="T2">EXIM data source</text:span></text:p>
            <text:p>•<text:s/><text:span text:style-name="T2">HSN code mapping:</text:span><text:s/>Across SFS SKUs<text:s/></text:p>
            <text:p>•<text:s/><text:span text:style-name="T2">SAP purchase register<text:s/></text:span>: actual buy prices linked to HSN codes for comparison</text:p>
            <text:p/>
            <text:p><text:span text:style-name="T2">Design:</text:span></text:p>
            <text:p>• Import benchmark dashboard (product-level, with trend charts and supplier country breakdown)</text:p>
            <text:p>• Alert threshold rules (e.g., alert when SFS price &gt;15% above import benchmark)</text:p>
            <text:p/>
            <text:p><text:span text:style-name="T2">Development:</text:span></text:p>
            <text:p>• Weekly EXIM data ingestion pipeline (normalize by HSN → data lake)</text:p>
            <text:p>• Price comparison engine (EXIM landed cost vs. SAP buy price by SKU)</text:p>
            <text:p>• Dashboard + automated email/Teams alert notification</text:p>
          </table:table-cell>
          <table:covered-table-cell/>
          <table:table-cell office:value-type="string" table:style-name="ce30">
            <text:p>5-10% allocation</text:p>
          </table:table-cell>
          <table:covered-table-cell/>
          <table:covered-table-cell/>
          <table:table-cell table:number-columns-repeated="16368" table:style-name="ce3"/>
        </table:table-row>
        <table:table-row table:style-name="ro14">
          <table:table-cell table:number-columns-repeated="2"/>
          <table:table-cell office:value-type="float" office:value="3" table:style-name="ce33">
            <text:p>3</text:p>
          </table:table-cell>
          <table:table-cell office:value-type="string" table:style-name="ce144">
            <text:p>AI-Driven Preparation Material for Negotiations</text:p>
          </table:table-cell>
          <table:table-cell office:value-type="string" table:style-name="ce24">
            <text:p>•<text:span text:style-name="T2"><text:s/>Aggregates SAP purchase history</text:span>, commodity indices, EXIM prices, and<text:s/><text:span text:style-name="T2">other macro signals<text:s/></text:span><text:span text:style-name="T3">(as relevant)<text:s/></text:span><text:span text:style-name="T2">into structured, category-specific negotiation packs.<text:s/></text:span></text:p>
            <text:p>•<text:s/><text:span text:style-name="T2">Auto-generates script, talking points, reference ranges<text:s/></text:span><text:span text:style-name="T3">(range of how high/ low can we go)</text:span><text:span text:style-name="T2">, and price anchors<text:s/></text:span><text:span text:style-name="T3">(starting price)</text:span><text:span text:style-name="T2"><text:s/></text:span>tailored to each vendor discussion.<text:s/><text:span text:style-name="T3">Internal vendor history leveraged to understanding historical purchasing patterns/ prices coupled with external market intelligence (EXIM, macro etc.) to facilitate data-backed negotiations</text:span></text:p>
            <text:p>•<text:s/><text:span text:style-name="T2">Flags historical vendor pricing patterns</text:span><text:s/>— e.g., trader markup over manufacturer price, seasonal price shifts</text:p>
            <text:p>•<text:s/><text:span text:style-name="T2">Supports timing-based buying decisions</text:span><text:s/>(eg: what time of the year is most optimum to buy a certain commodity)</text:p>
            <text:p/>
          </table:table-cell>
          <table:table-cell office:value-type="string" table:style-name="ce131">
            <text:p>•<text:s/><text:span text:style-name="T2">Negotiation prep is entirely manual and experience-dependent<text:s/></text:span>— no standardized process</text:p>
            <text:p>•<text:s/><text:span text:style-name="T2">No consolidated view of commodity prices, import benchmarks, or vendor pricing history</text:span></text:p>
            <text:p>• Buyers lack data backed benchmark/ insights at the point of negotiation<text:s/></text:p>
            <text:p>• Same commodity bought<text:span text:style-name="T2"><text:s/>at different prices by different buyers in the same month</text:span></text:p>
            <text:p>•<text:s/><text:span text:style-name="T2">Inconsistent negotiation outcomes across buyers<text:s/></text:span>due to varying levels of individual preparedness</text:p>
            <text:p>•<text:s/><text:span text:style-name="T2">High manual effort with low leverage</text:span><text:s/>— team spends days preparing what AI can generate in minutes</text:p>
            <text:p>•<text:s/><text:span text:style-name="T2">Optimal purchase timing unknown<text:s/></text:span>— buyers often lock in prices at seasonal peaks</text:p>
          </table:table-cell>
          <table:table-cell office:value-type="string" table:style-name="ce68">
            <text:p><text:span text:style-name="T2">Data and Analytics gaps:</text:span></text:p>
            <text:p><text:span text:style-name="T2">• Lack of a consolidated view of internal SAP data + external datasets<text:s/></text:span>(eg: EXIM)<text:span text:style-name="T2"/></text:p>
            <text:p><text:span text:style-name="T2">• No automated insights on price patterns and movements</text:span><text:span text:style-name="T8"><text:s/></text:span>generated leveraging EXIM import data</text:p>
            <text:p/>
            <text:p><text:span text:style-name="T2">Tool fragmentation:</text:span></text:p>
            <text:p>• Price research and other relevant details across vendors spread across Google, WhatsApp, vendor calls, personal Excel files — none integrated<text:s/></text:p>
            <text:p>•<text:s/><text:span text:style-name="T2">SAP holds the data such as purchase order price, purchase history, delivery timelines<text:s/></text:span>etc. but has no analytical layer to surface negotiation insights</text:p>
          </table:table-cell>
          <table:table-cell office:value-type="string" table:style-name="ce34">
            <text:p>• If a sourcing manager discusses with a vendor for new contract,<text:s/><text:span text:style-name="T2">they will be able to Shortlist vendors based on defaults</text:span>, past performance price etc.(Use case 1) and then be armed with talking points around max reduced price we could ask the vendor, typical markup on the product, macro indicators etc.</text:p>
            <text:p>•<text:s/><text:span text:style-name="T2">Sourcing manager selects commodity + vendor → full negotiation brief generated in &lt;2 minutes</text:span></text:p>
            <text:p>• Brief includes: EXIM benchmark vs. last 3 purchase prices, recommended target price, seasonal buy pattern, LLM-<text:span text:style-name="T2">generated opening position and counter-offer scripts<text:s/></text:span><text:span text:style-name="T3">(dependent upon expected response from vendors)</text:span></text:p>
            <text:p>• System flags: 'Vendor historically quotes 8–12% above market in Q2 — consider delaying PO or locking alternate vendor'</text:p>
            <text:p>•<text:s/><text:span text:style-name="T2">Real-time prompt interface for live negotiations</text:span>: commodity prices pulled on demand</text:p>
            <text:p>•<text:s/><text:span text:style-name="T2">Negotiation outcomes logged back</text:span><text:s/>→ learning loop improves future briefs</text:p>
          </table:table-cell>
          <table:table-cell office:value-type="string" table:style-name="ce35">
            <text:p>•<text:s/><text:span text:style-name="T2">Negotiation prep: 2–3 days → &lt;30 minutes</text:span></text:p>
            <text:p>•<text:s/><text:span text:style-name="T2">Data-backed anchors</text:span><text:s/>drive incremental improvement in realized savings</text:p>
            <text:p>•<text:s/><text:span text:style-name="T2">Timing intelligence avoids peak-market purchases<text:s/></text:span></text:p>
            <text:p>•<text:s/><text:span text:style-name="T2">Eliminates inter-buyer price inconsistency</text:span><text:s/>across categories</text:p>
            <text:p>•<text:span text:style-name="T2"><text:s/>Creates auditable negotiation record</text:span><text:s/>for governance and vendor review</text:p>
            <text:p>•<text:s/><text:span text:style-name="T2">Standardization of negotiation quality<text:s/></text:span>across buyers</text:p>
            <text:p>•<text:s/><text:span text:style-name="T2">Reduced dependency on individual experience<text:s/></text:span>(“hero buyers”)</text:p>
            <text:p>• Creation of<text:s/><text:span text:style-name="T2">institutional negotiation knowledge base</text:span></text:p>
          </table:table-cell>
          <table:covered-table-cell/>
          <table:covered-table-cell/>
          <table:table-cell office:value-type="string" table:style-name="ce34">
            <text:p><text:span text:style-name="T2">Data collation/ sourcing:</text:span></text:p>
            <text:p>•<text:s/><text:span text:style-name="T2">SAP purchase register<text:s/></text:span>(FY22–FY25) by SKU</text:p>
            <text:p>• EXIM feed by HSN code</text:p>
            <text:p>• Commodity price APIs<text:s/></text:p>
            <text:p>• <text:s/>Internal negotiation outcome log<text:s/></text:p>
            <text:p><text:span text:style-name="T2"/></text:p>
            <text:p><text:span text:style-name="T2">Design:</text:span></text:p>
            <text:p>• Negotiation brief template (benchmark, talking points, timing, vendor history)</text:p>
            <text:p>• LLM prompt/ indents chains per commodity group</text:p>
            <text:p>• Real-time prompt interface UX</text:p>
            <text:p/>
            <text:p><text:span text:style-name="T2">Development:</text:span></text:p>
            <text:p>• Multi-source RAG pipeline (SAP + EXIM + commodity → vector store)</text:p>
            <text:p>• LLM orchestration + seasonal pattern detection model · Brief generator + live prompt UI</text:p>
          </table:table-cell>
          <table:covered-table-cell/>
          <table:table-cell office:value-type="string" table:style-name="ce36">
            <text:p>25-30% allocation</text:p>
          </table:table-cell>
          <table:covered-table-cell/>
          <table:covered-table-cell/>
          <table:table-cell table:number-columns-repeated="16368" table:style-name="ce3"/>
        </table:table-row>
        <table:table-row table:style-name="ro15">
          <table:table-cell table:number-columns-repeated="2"/>
          <table:table-cell office:value-type="float" office:value="4" table:style-name="ce37">
            <text:p>4</text:p>
          </table:table-cell>
          <table:table-cell office:value-type="string" table:style-name="ce145">
            <text:p>AI-Led Vendor Identification &amp; Recommendation</text:p>
          </table:table-cell>
          <table:table-cell office:value-type="string" table:style-name="ce130">
            <text:p>•<text:s/><text:span text:style-name="T2">AI scans internal procurement history (SAP/Ariba) and external databases</text:span><text:s/>to surface best-fit vendors per commodity or product category based on market pricing, historical performance (as per available data)</text:p>
            <text:p>•<text:s/><text:span text:style-name="T2">Filters vendors by price, quality certifications, geographic proximity</text:span>, and capacity to supply desired quantity (+ any other relevant criteria)</text:p>
            <text:p>•<text:s/><text:span text:style-name="T2">Auto-ranks and recommends optimal vendor mix<text:s/></text:span>for each sourcing cycle, reducing buyer workload</text:p>
            <text:p>•<text:s/><text:span text:style-name="T2">Integrates with Ariba</text:span><text:s/><text:span text:style-name="T3">(to be evaluated based on current Ariba use-case)</text:span><text:s/>to trigger RFQ workflows directly from AI recommendations and leverage new vendors onboarded on Ariba into a single platform</text:p>
            <text:p>• Creates<text:s/><text:span text:style-name="T2">detailed vendor profiles (for existing vendors)<text:s/></text:span>based on past purchase data and performance</text:p>
          </table:table-cell>
          <table:table-cell office:value-type="string" table:style-name="ce131">
            <text:p>•<text:s/><text:span text:style-name="T2">Vendor selection is relationship-driven</text:span><text:s/>— no structured market scanning used for selection of the best vendor (based on price, performance review etc.)</text:p>
            <text:p>•<text:s/><text:span text:style-name="T2">New vendors shortlisted via conversations/email/Excel;<text:s/></text:span>no system driven diligence process leading to high manual effort</text:p>
            <text:p>•<text:s/><text:span text:style-name="T2">No unified vendor performance view<text:s/></text:span>— data split across SAP, email, individual files</text:p>
            <text:p>•<text:s/><text:span text:style-name="T2">Share of wallet allocation based on manual analysis o</text:span>f historical data and available market intelligence</text:p>
            <text:p>•<text:s/><text:span text:style-name="T2">Procurement team bandwidth consumed by vendor discovery</text:span><text:s/>rather than<text:s/><text:span text:style-name="T2">strategic analysis</text:span></text:p>
          </table:table-cell>
          <table:table-cell office:value-type="string" table:style-name="ce131">
            <text:p><text:span text:style-name="T2">Data and Analytics gaps:</text:span></text:p>
            <text:p>•<text:s/><text:span text:style-name="T2">External market information about vendors and indicators about performance/ quality of vendors<text:s/></text:span>(new entrants, alternate manufacturers) not available to buyers in a consolidated way</text:p>
            <text:p/>
            <text:p><text:span text:style-name="T2">Tool fragmentation:</text:span></text:p>
            <text:p>• SAP, Ariba (being implemented), Email, Excel — none integrated into a decision workflow</text:p>
          </table:table-cell>
          <table:table-cell office:value-type="string" table:style-name="ce38">
            <text:p>•<text:s/><text:span text:style-name="T2">Sourcing manager selects a commodity/ raw material<text:s/></text:span>→ instantly receives AI-ranked vendor list with<text:s/><text:span text:style-name="T2">data points such as price benchmarks, quality scores, capacity signals, and risk flags<text:s/></text:span>(based on available information for existing/ new vendors)</text:p>
            <text:p>•<text:s/><text:span text:style-name="T2">Rankings auto-refresh weekly from live SAP + external signals</text:span><text:s/>(depending upon availability of data)— no manual refresh</text:p>
            <text:p>•<text:span text:style-name="T2"><text:s/>One-click Ariba RFQ trigger from the recommendation interface</text:span></text:p>
            <text:p>•<text:s/><text:span text:style-name="T2">New vendor suggestions flagged for onboarding</text:span><text:s/>→ auto-linked to fraud/creditworthiness check (based on current data points available)</text:p>
            <text:p>•<text:s/><text:span text:style-name="T2">Ongoing performance dashboard:</text:span><text:s/>on-time delivery, current price vs. Best vendor price<text:s/><text:span text:style-name="T3">(primarily based on EXIM data - as per data availability)</text:span>, quality rejection rate</text:p>
          </table:table-cell>
          <table:table-cell office:value-type="string" table:style-name="ce24">
            <text:p>•<text:s/><text:span text:style-name="T2">Reduces vendor discovery time by &gt;90</text:span>%; expands supplier optionality into new geographies and manufacturer tiers</text:p>
            <text:p>•<text:s/><text:span text:style-name="T2">Enables systematic BPV (Best Price Vendor)<text:s/></text:span>targeting — spend reduction primarily in OP seeds, SPN and CP procurement<text:s/></text:p>
            <text:p>•<text:s/><text:span text:style-name="T2">Reduces single-vendor dependency</text:span>, improving supply continuity and sourcing resilience</text:p>
            <text:p>•<text:s/><text:span text:style-name="T2">Unlocks bandwidth<text:s/></text:span>to focus on analytics and insight generation</text:p>
            <text:p>•<text:s/><text:span text:style-name="T2">Better spend consolidation<text:s/></text:span>(volume concentration with best vendors)</text:p>
            <text:p>•<text:s/><text:span text:style-name="T2">Reduced maverick sourcing<text:s/></text:span>/ off-contract buying</text:p>
            <text:p>•<text:span text:style-name="T2"><text:s/>Reduced onboarding cycle time for new vendors</text:span></text:p>
          </table:table-cell>
          <table:covered-table-cell/>
          <table:covered-table-cell/>
          <table:table-cell office:value-type="string" table:style-name="ce115">
            <text:p><text:span text:style-name="T2">Data collation:</text:span></text:p>
            <text:p>• SAP vendor master, PO history, GRN records (FY23–FY25), External vendor Databases depending upon priority raw materials/ commodities<text:s/></text:p>
            <text:p>• Ariba API connector for RFQ trigger</text:p>
            <text:p><text:span text:style-name="T2"/></text:p>
            <text:p><text:span text:style-name="T2">Design:</text:span></text:p>
            <text:p>• Multi-criteria scoring framework (price, quality, delivery, risk weightings) · Recommendation UI</text:p>
            <text:p>• Alert logic for performance deterioration and new vendor flags</text:p>
            <text:p/>
            <text:p><text:span text:style-name="T2">Development:</text:span></text:p>
            <text:p>• Vendor scoring model along with a robust scoring engine pipeline leveraging internal data and external sources</text:p>
          </table:table-cell>
          <table:covered-table-cell/>
          <table:table-cell office:value-type="string" table:style-name="ce40">
            <text:p>10-15% allocation</text:p>
          </table:table-cell>
          <table:covered-table-cell/>
          <table:covered-table-cell/>
          <table:table-cell table:number-columns-repeated="16368" table:style-name="ce3"/>
        </table:table-row>
        <table:table-row table:style-name="ro16">
          <table:table-cell table:number-columns-repeated="2"/>
          <table:table-cell office:value-type="float" office:value="5" table:style-name="ce23">
            <text:p>5</text:p>
          </table:table-cell>
          <table:table-cell office:value-type="string" table:style-name="ce142">
            <text:p>Vendor Creditworthiness &amp; Fraud Check</text:p>
          </table:table-cell>
          <table:table-cell office:value-type="string" table:style-name="ce130">
            <text:p>•<text:s/><text:span text:style-name="T2">Verifies vendor authenticity using<text:s/></text:span>GST registrations, MCA filings, credit bureau scores ,court / litigation records<text:s/><text:span text:style-name="T3">(publicly available)<text:s/></text:span></text:p>
            <text:p>•<text:s/><text:span text:style-name="T2">Flags shell companies</text:span>,<text:s/><text:span text:style-name="T2">duplicate PAN / GST entities</text:span>, and vendors exhibiting adverse financial signals</text:p>
            <text:p>• Monitors vendors on an ongoing basis —<text:s/><text:span text:style-name="T2">alerts triggered by GST defaults</text:span>, insolvency filings, or delivery anomalies</text:p>
            <text:p>• Potential to<text:s/><text:span text:style-name="T2">integrate with vendor onboarding workflow</text:span></text:p>
          </table:table-cell>
          <table:table-cell office:value-type="string" table:style-name="ce131">
            <text:p><text:span text:style-name="T2">• No system enabled fraud and default detection alert generator<text:s/></text:span></text:p>
            <text:p><text:span text:style-name="T2">• Vendor onboarding includes offline document collection<text:s/></text:span>(GST certificate, PAN, bank account) + verification from some available third party sources</text:p>
            <text:p><text:s/>• Potential fo<text:span text:style-name="T2">r compliance gaps to create direct, untracked tax risk f</text:span>or SFS</text:p>
            <text:p>• Manual checks (when done) = individual website lookups and third party dependence</text:p>
            <text:p>• Lack of real time availability of vendor financial health during sourcing decisions</text:p>
          </table:table-cell>
          <table:table-cell office:value-type="string" table:style-name="ce131">
            <text:p><text:span text:style-name="T2">Data and Analytics gaps:</text:span></text:p>
            <text:p>• Holistic vendor credit profile data absent</text:p>
            <text:p>• GST portal, MCA21, credit bureaus etc. — not all API-accessible databases leveraged</text:p>
            <text:p>•<text:s/><text:span text:style-name="T2">Lack of a robust and real time and performance database<text:s/></text:span>linking delivery delays, quality rejections, and payment disputes</text:p>
            <text:p/>
          </table:table-cell>
          <table:table-cell office:value-type="string" table:style-name="ce25">
            <text:p>•<text:s/><text:span text:style-name="T2">New vendor: buyer submits details in Ariba<text:s/></text:span><text:span text:style-name="T3">(to be validated from SFS)</text:span>→ risk check auto-runs → score + flag summary returned in minutes → supply chain head approves or rejects</text:p>
            <text:p>•<text:s/><text:span text:style-name="T2">Monthly alert</text:span>: 'Vendor XYZ (INR XX Cr annual spend) missed GST filing for 2 consecutive months — input tax credit risk. Recommended: hold new POs pending clarification'</text:p>
            <text:p>•<text:s/><text:span text:style-name="T2">Risk-tiered vendor dashboard: color-coded by risk level<text:s/></text:span>(green/amber/red) with drill-down to specific risk factors</text:p>
            <text:p>•<text:s/><text:span text:style-name="T2">Pre-PO prompt for high-risk vendors</text:span>: system flags risk score before buyer confirms large orders</text:p>
            <text:p>•<text:s/><text:span text:style-name="T2">Leadership reporting:<text:s/></text:span>vendor risk distribution, total spend at risk, recommended actions</text:p>
          </table:table-cell>
          <table:table-cell office:value-type="string" table:style-name="ce116">
            <text:p>•<text:s/><text:span text:style-name="T2">Reduces financial and reputational risk from vendor default</text:span><text:s/>or fraud — especially for the 300+ vendor long tail</text:p>
            <text:p>•<text:s/><text:span text:style-name="T2">Eliminates GST input tax credit risk</text:span>: proactive monitoring prevents SFS paying vendors who then fail to deposit GST</text:p>
            <text:p>•<text:s/><text:span text:style-name="T2">Enables safe vendor base expansion</text:span><text:s/>— new BPV alternatives screened before volume allocation</text:p>
            <text:p>•<text:s/><text:span text:style-name="T2">Auto workflow:</text:span><text:s/>recommended vendors are financially screened before RFQ trigger</text:p>
          </table:table-cell>
          <table:covered-table-cell/>
          <table:covered-table-cell/>
          <table:table-cell office:value-type="string" table:style-name="ce25">
            <text:p><text:span text:style-name="T2">Data collation/ sourcing:</text:span></text:p>
            <text:p>• External compliance portals (eg: GST portal API: GSTIN status, return filing history, default flags, MCA21 API, Credit bureau: Experian Commercial / CIBIL Commercial API, court records)</text:p>
            <text:p>• SAP vendor master<text:s/></text:p>
            <text:p><text:span text:style-name="T2"/></text:p>
            <text:p><text:span text:style-name="T2">Design:</text:span></text:p>
            <text:p>• Composite Vendor Risk Score: component weightings (GST, credit, delivery, litigation)</text:p>
            <text:p>• Risk tier thresholds · Ariba onboarding integration design · Alert and escalation logic</text:p>
            <text:p/>
            <text:p><text:span text:style-name="T2">Development:</text:span></text:p>
            <text:p>• External API connectors (eg: GST, MCA21, credit bureau, NJDG)</text:p>
            <text:p>• Risk scoring model + tier classifier · Ariba onboarding hook · Monthly monitoring scheduler</text:p>
            <text:p>• Risk dashboard (tier view, alert feed, vendor drill-down)</text:p>
            <text:p/>
          </table:table-cell>
          <table:covered-table-cell/>
          <table:table-cell office:value-type="string" table:style-name="ce30">
            <text:p>10-15% allocation</text:p>
          </table:table-cell>
          <table:covered-table-cell/>
          <table:covered-table-cell/>
          <table:table-cell table:number-columns-repeated="16368" table:style-name="ce3"/>
        </table:table-row>
        <table:table-row table:style-name="ro17">
          <table:table-cell table:number-columns-repeated="2"/>
          <table:table-cell office:value-type="float" office:value="6" table:style-name="ce41">
            <text:p>6</text:p>
          </table:table-cell>
          <table:table-cell office:value-type="string" table:style-name="ce146">
            <text:p>AI-Driven Should-Cost Analysis<text:s/></text:p>
            <text:p><text:span text:style-name="T4">(across the top 5-10 products)</text:span></text:p>
          </table:table-cell>
          <table:table-cell office:value-type="string" table:style-name="ce130">
            <text:p>•<text:s/><text:span text:style-name="T2">Builds bottom-up cost models per product category</text:span><text:s/>— incorporating raw materials, labor, overheads, logistics, and working capital</text:p>
            <text:p>•<text:s/><text:span text:style-name="T2">Benchmark individual cost lever<text:s/></text:span>vs. should-cost (externally sourced) to identify savings opportunities (eg: packaging material, OP seeds)</text:p>
            <text:p>•<text:s/><text:span text:style-name="T2">Also applicable for contract growing of seeds<text:s/></text:span>to benchmark conversion costs</text:p>
            <text:p>• At a product level<text:span text:style-name="T2">, benchmarks restricted to large commodities<text:s/></text:span>with external benchmarks available</text:p>
            <text:p/>
          </table:table-cell>
          <table:table-cell office:value-type="string" table:style-name="ce131">
            <text:p>•<text:s/><text:span text:style-name="T2">No should-cost models exist<text:s/></text:span>for any procurement category; manual estimations done on an ad-hoc and post-facto basis</text:p>
            <text:p>•<text:s/><text:span text:style-name="T2">Buyers reference their own historical purchase prices<text:s/></text:span>— not a forward-looking cost build-up</text:p>
            <text:p>•<text:s/><text:span text:style-name="T2">Vendor cost increase claims accepted or rejected on individual buyer judgmen</text:span>t, with no verified cost data</text:p>
            <text:p/>
          </table:table-cell>
          <table:table-cell office:value-type="string" table:style-name="ce131">
            <text:p><text:span text:style-name="T2">Data and Analytics gaps:</text:span></text:p>
            <text:p>•<text:s/><text:span text:style-name="T2">Component cost data</text:span><text:s/>(labor rates, processing, working capital) not collected or structured</text:p>
            <text:p>•<text:s/><text:span text:style-name="T2">Raw material price indices not connected<text:s/></text:span>to any procurement cost models</text:p>
            <text:p>• Buyers dont have relevant backup information to<text:s/><text:span text:style-name="T2">distinguish genuine vendor price increase due to inflation vs. margin extraction<text:s/></text:span>— both look identical from the outside</text:p>
            <text:p/>
            <text:p><text:span text:style-name="T2">Tool absence:</text:span></text:p>
            <text:p>• No tool available - currently a combination of SAP, Excel + informal conversations leveraged</text:p>
          </table:table-cell>
          <table:table-cell office:value-type="string" table:style-name="ce42">
            <text:p>•<text:s/><text:span text:style-name="T2">Before a major negotiation or annual contracting</text:span>, category manager opens Should-Cost tool, selects SKU → full cost build-up generated: raw material + conversion + logistics + working capital + target margin</text:p>
            <text:p><text:span text:style-name="T2">• Sample alert output:</text:span><text:s/>'Should-cost: INR 3,350–3,450/quintal. Last contracted price: INR 3,575/quintal. Headroom: INR 125–225/quintal (3-6%)'</text:p>
            <text:p>•<text:span text:style-name="T2"><text:s/>LLM reads vendor-submitted cost sheets</text:span>: 'Vendor's claimed processing cost of INR 340/quintal exceeds industry benchmark of INR 212–250/quintal by 36%'</text:p>
          </table:table-cell>
          <table:table-cell office:value-type="string" table:style-name="ce117">
            <text:p>•<text:s/><text:span text:style-name="T2">Savings potential and best price vendor identification<text:s/></text:span></text:p>
            <text:p>•<text:s/><text:span text:style-name="T2">Eliminates vendor information asymmetry<text:s/></text:span>— SFS challenges cost increase claims with a quantified counter-model</text:p>
            <text:p>•<text:s/><text:span text:style-name="T2">Enables index-linked pricing contracts<text:s/></text:span>— reduces annual renegotiation cycles</text:p>
            <text:p>•<text:s/><text:span text:style-name="T2">Equips sourcing team for data backed vendor negotiations</text:span></text:p>
            <text:p>•<text:s/><text:span text:style-name="T2">Capability to simulate “what-if” scenarios<text:s/></text:span>for leadership decisions</text:p>
          </table:table-cell>
          <table:covered-table-cell/>
          <table:covered-table-cell/>
          <table:table-cell office:value-type="string" table:style-name="ce42">
            <text:p><text:span text:style-name="T2">Data collation/ sourcing:</text:span></text:p>
            <text:p>•<text:s/><text:span text:style-name="T2">Contract data (for seeds)</text:span>: conversion cost components by grower/region</text:p>
            <text:p>•<text:s/><text:span text:style-name="T2">Commodity feeds</text:span>: wheat MSP (government notifications), relevant commodities, crude oil index</text:p>
            <text:p>•<text:s/><text:span text:style-name="T2">Labor benchmarks</text:span></text:p>
            <text:p>•<text:s/><text:span text:style-name="T2">Vendor cost sheets</text:span></text:p>
            <text:p/>
            <text:p><text:span text:style-name="T2">Design:</text:span></text:p>
            <text:p>•<text:s/><text:span text:style-name="T2">Should-cost component tree per category<text:s/></text:span>(seeds, CP, SPN, packaging)</text:p>
            <text:p>•<text:s/><text:span text:style-name="T2">Scenario parameter design:</text:span><text:s/>commodity price assumption levers, cost escalation rates</text:p>
            <text:p>•<text:s/><text:span text:style-name="T2">LLM extraction workflow design</text:span>: vendor document upload → parsing → comparison to model</text:p>
            <text:p/>
            <text:p><text:span text:style-name="T2">Development:</text:span></text:p>
            <text:p>• Cost model engine (category-specific, live commodity price feeds)</text:p>
            <text:p>• Scenario analysis module: slider-based UI → real-time should-cost update</text:p>
            <text:p>• LLM document parsing layer + comparison to benchmark</text:p>
          </table:table-cell>
          <table:covered-table-cell/>
          <table:table-cell office:value-type="string" table:style-name="ce46">
            <text:p>25-30% allocation</text:p>
          </table:table-cell>
          <table:covered-table-cell/>
          <table:covered-table-cell/>
          <table:table-cell table:style-name="ce3"/>
          <table:table-cell table:style-name="ce49"/>
          <table:table-cell table:number-columns-repeated="16366"/>
        </table:table-row>
        <table:table-row table:style-name="ro3">
          <table:table-cell table:number-columns-repeated="2"/>
          <table:table-cell table:style-name="ce139"/>
          <table:table-cell table:style-name="ce147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style-name="ce3"/>
          <table:table-cell table:style-name="ce50"/>
          <table:table-cell table:style-name="ce3"/>
          <table:table-cell table:style-name="ce51"/>
          <table:table-cell table:style-name="ce50"/>
          <table:table-cell table:style-name="ce3"/>
          <table:table-cell table:style-name="ce50"/>
          <table:table-cell table:number-columns-repeated="16368" table:style-name="ce3"/>
        </table:table-row>
        <table:table-row table:style-name="ro1">
          <table:table-cell table:number-columns-repeated="2"/>
          <table:table-cell table:style-name="ce139"/>
          <table:table-cell table:style-name="ce147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style-name="ce3"/>
          <table:table-cell table:style-name="ce50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number-columns-repeated="16368" table:style-name="ce3"/>
        </table:table-row>
        <table:table-row table:style-name="ro2">
          <table:table-cell table:number-columns-repeated="2"/>
          <table:table-cell office:value-type="string" table:style-name="ce163">
            <text:p>FIELD FORCE (MGOs) + SALESFORCE</text:p>
          </table:table-cell>
          <table:table-cell table:style-name="ce162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style-name="ce3"/>
          <table:table-cell table:style-name="ce50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number-columns-repeated="16368" table:style-name="ce3"/>
        </table:table-row>
        <table:table-row table:style-name="ro18">
          <table:table-cell table:number-columns-repeated="2"/>
          <table:table-cell office:value-type="float" office:value="1" table:style-name="ce155">
            <text:p>1</text:p>
          </table:table-cell>
          <table:table-cell office:value-type="string" table:style-name="ce142">
            <text:p>Field Performance Tracking Dashboard</text:p>
          </table:table-cell>
          <table:table-cell office:value-type="string" table:number-columns-spanned="1" table:number-rows-spanned="2" table:style-name="ce198">
            <text:p>•<text:s/><text:span text:style-name="T2">Integrates Growthbook activity data<text:s/></text:span>with SAP sales, collections and target data into a unified performance and incentive dashboard<text:s/><text:span text:style-name="T2">for TBMs/RBMs</text:span></text:p>
            <text:p>•<text:s/><text:span text:style-name="T2">Overlays an LLM layer that accepts natural-language queries on performance analytics<text:s/></text:span>(e.g., 'Top 5 dealers missing Q1 targets in Kurukshetra') and returns answers with auto-generated charts/ insights</text:p>
            <text:p>• Pre-defined report templates for TBMs/ RBMs (<text:span text:style-name="T6">for field activity and performance reporting for leadership reviews</text:span>)</text:p>
            <text:p>•<text:s/><text:span text:style-name="T2">Integration of field related expenditure<text:s/></text:span>(via Concur) to provide a holistic end-to-end view</text:p>
            <text:p>•<text:s/><text:span text:style-name="T2">Proposed future use-case:</text:span><text:s/>Integration of secondary sales and inventory liquidation data post significant adoption of 'Smart Fasal' app</text:p>
          </table:table-cell>
          <table:table-cell office:value-type="string" table:number-columns-spanned="1" table:number-rows-spanned="2" table:style-name="ce199">
            <text:p>•<text:s/><text:span text:style-name="T2">Manual reconciliation in excels by TBMs/RBMs</text:span><text:s/>- pull sales, collections and targets from SAP reports/ excels; field activity data from Growthbook — and reconcile manually<text:s/></text:p>
            <text:p>•<text:s/><text:span text:style-name="T2">Limited visibility to MGOs on current incentives<text:s/></text:span>and real-time analysis of target realization</text:p>
            <text:p>•<text:s/><text:span text:style-name="T2">Significant time spent by TBM/ RBMs<text:s/></text:span>to prepare reports for monthly review with HO<text:span text:style-name="T2"/></text:p>
            <text:p>• No real-time view of a<text:span text:style-name="T2">ctivity-to-outcome linkage</text:span></text:p>
            <text:p/>
            <text:p/>
          </table:table-cell>
          <table:table-cell office:value-type="string" table:number-columns-spanned="1" table:number-rows-spanned="2" table:style-name="ce199">
            <text:p><text:span text:style-name="T2">Data and Analytics gaps:</text:span></text:p>
            <text:p>• No single source of truth for a consolidated view across datasets (sales, field activities, expenses etc.)<text:s/></text:p>
            <text:p>• (For future use-case)<text:s/><text:span text:style-name="T2">Secondary sales/ inventory liquidation data<text:s/></text:span>to be incorporated as per availability/ currently not collected;<text:s/><text:span text:style-name="T2">POG trackers updated<text:s/></text:span>only based on calls with distributors/ dealers</text:p>
            <text:p>•<text:s/><text:span text:style-name="T2">Activity outcomes/ ROI not tagged<text:s/></text:span>— attendance counted but conversion to sale not tracked<text:s/></text:p>
            <text:p>•<text:s/><text:span text:style-name="T2">Monthly/ quarterly/ annual targets maintained in manual excel files at an RO level<text:s/></text:span>and not driven by a central system<text:span text:style-name="T8"><text:s/></text:span></text:p>
            <text:p><text:span text:style-name="T2"/></text:p>
            <text:p><text:span text:style-name="T2">Tool fragmentation and absence:</text:span></text:p>
            <text:p>• SAP reports + Growthbook app + Excel pivots + WhatsApp updates + Concur (for field related expenditure)— field activity segregated across tools</text:p>
            <text:p>• No analytical visualization layer to provide a consolidated view</text:p>
          </table:table-cell>
          <table:table-cell office:value-type="string" table:number-columns-spanned="1" table:number-rows-spanned="2" table:style-name="ce200">
            <text:p>•<text:s/><text:span text:style-name="T2">RBM/ TBM opens the dashboard</text:span><text:s/>on mobile/laptop → lands on a personalized view: his territory's sales vs. target, top 5 underperforming dealers, activity completion rate for the week leading to timely intervention vs. post-facto analysis<text:s/></text:p>
            <text:p>•<text:s/><text:span text:style-name="T2">Sales team / MGO are able to see a real-time status of their incentives<text:s/></text:span>and performance vs. targets</text:p>
            <text:p>•<text:s/><text:span text:style-name="T2">RBM/ TBM asks in natural language</text:span>: 'Which dealers in my region saw &gt;20% sales drop vs. last quarter?' — gets ranked list with root-cause hypotheses (fewer MGO visits, scheme miscommunication, etc.)</text:p>
            <text:p>• HO leadership uses the same dashboard<text:s/><text:span text:style-name="T2">for monthly reviews, replacing excel reports</text:span></text:p>
            <text:p><text:span text:style-name="T2">• Auto-generated weekly insight card pushed to RBM/ TBM</text:span>:eg: 'Farmer meetings with &gt;40 attendees in Territory X converted at 2.3x baseline; scale this model to Territory Y where you have 3 dealers with similar farmer base (based on location, crop type etc.)</text:p>
          </table:table-cell>
          <table:table-cell office:value-type="string" table:number-columns-spanned="1" table:number-rows-spanned="2" table:style-name="ce198">
            <text:p>•<text:s/><text:span text:style-name="T2">Eliminates 2-3 days/month of manual reporting effort<text:s/></text:span></text:p>
            <text:p>• Shifts review cadence from monthly retrospective to weekly forward-looking</text:p>
            <text:p>•<text:s/><text:span text:style-name="T2">Natural language query removes analytics as a skill barrier<text:s/></text:span>— every TBM/ RBM becomes a self-serve analyst</text:p>
            <text:p>•<text:s/><text:span text:style-name="T2">Enables early correction of off-track territories<text:s/></text:span></text:p>
          </table:table-cell>
          <table:table-cell office:value-type="string" table:number-columns-spanned="1" table:number-rows-spanned="8" table:style-name="ce201">
            <text:p>•<text:span text:style-name="T2"><text:s/>Channel partner NPS:</text:span><text:s/>15-20 p.p. increment</text:p>
            <text:p>•<text:s/><text:span text:style-name="T2">Increased product awareness<text:s/></text:span>for both field force &amp; channel partners</text:p>
            <text:p>•<text:span text:style-name="T2"><text:s/>Increased schemes participation</text:span></text:p>
            <text:p>•<text:span text:style-name="T2"><text:s/>Reduced # of returns/ C.P</text:span>.</text:p>
          </table:table-cell>
          <table:table-cell office:value-type="string" table:number-columns-spanned="1" table:number-rows-spanned="8" table:style-name="ce193">
            <text:p><text:span text:style-name="T2">Incremental revenue of INR 50-80 Cr</text:span></text:p>
            <text:p><text:span text:style-name="T3">(7-10% increase on 1433 Cr baseline at a 50-60% adoption)<text:s/></text:span>impacting:</text:p>
            <text:p>– Avg rev/ salesforce</text:p>
            <text:p>– Avg. sales/ channel partner</text:p>
            <text:p/>
            <text:p>•<text:span text:style-name="T2"><text:s/>Channel partner coverage/ salesforce: 20-25% increment<text:s/></text:span>(30 CP/ Salesforce vs. current avg. of 25)</text:p>
            <text:p>•<text:s/><text:span text:style-name="T2">Farmer Reach:<text:s/></text:span>30-40% increment to reach 38-40L (vs. 30-33L currently)</text:p>
          </table:table-cell>
          <table:table-cell office:value-type="string" table:number-columns-spanned="1" table:number-rows-spanned="2" table:style-name="ce194">
            <text:p><text:span text:style-name="T2">Data:</text:span></text:p>
            <text:p>•<text:s/><text:span text:style-name="T2">Growthbook activity logs<text:s/></text:span>(historical)</text:p>
            <text:p>• SAP sales, collections, targets at TBM × dealer × SKU × month granularity</text:p>
            <text:p>•<text:s/><text:span text:style-name="T2">Master data harmonisation</text:span>: dealer ID, territory, product hierarchy alignment across Growthbook and SAP</text:p>
            <text:p>•<text:s/><text:span text:style-name="T2">Excel files for monthly/ quarterly/ yearly targets<text:s/></text:span>and historical realization of those targets</text:p>
            <text:p>•<text:s/><text:span text:style-name="T2">MGO Incentive structure and payout logic</text:span></text:p>
            <text:p/>
            <text:p><text:span text:style-name="T2">Design:</text:span></text:p>
            <text:p>• Dashboard wireframes for TBM view, RBM view, HO view<text:s/></text:p>
            <text:p>• Natural language query intent mapping for expected questions and analytics</text:p>
            <text:p/>
            <text:p><text:span text:style-name="T2">Development:</text:span></text:p>
            <text:p>• Data lake layer: Growthbook + SAP ingestion pipelines with scheduled refresh</text:p>
            <text:p>• Semantic layer + KPI store for consistent metric computation</text:p>
            <text:p>• LLM integration with RAG over schema + KPI definitions + business glossary</text:p>
            <text:p>• Charting library for auto-generated visuals from NL queries</text:p>
          </table:table-cell>
          <table:table-cell office:value-type="string" table:number-columns-spanned="1" table:number-rows-spanned="8" table:style-name="ce195">
            <text:p><text:span text:style-name="T5">M+2/3 team for complete 8 months<text:s/></text:span>with staggered allocations basis effort required</text:p>
            <text:p/>
            <text:p><text:span text:style-name="T4">(50-60% allocation during design phase and slowly tapering down to 20-30% allocation during POC and MVP stage)</text:span></text:p>
          </table:table-cell>
          <table:table-cell office:value-type="string" table:number-columns-spanned="1" table:number-rows-spanned="2" table:style-name="ce196">
            <text:p>5-10% allocation</text:p>
          </table:table-cell>
          <table:table-cell office:value-type="string" table:number-columns-spanned="1" table:number-rows-spanned="8" table:style-name="ce197">
            <text:p>INR 4.0 Cr</text:p>
            <text:p>(at a solution level)</text:p>
          </table:table-cell>
          <table:table-cell office:value-type="string" table:number-columns-spanned="1" table:number-rows-spanned="8" table:style-name="ce57">
            <text:p>INR 4.5 Cr<text:span text:style-name="T10"/></text:p>
            <text:p>(at a solution level)</text:p>
          </table:table-cell>
          <table:table-cell table:number-columns-repeated="16368" table:style-name="ce3"/>
        </table:table-row>
        <table:table-row table:style-name="ro19">
          <table:table-cell table:number-columns-repeated="2"/>
          <table:table-cell office:value-type="float" office:value="2" table:style-name="ce155">
            <text:p>2</text:p>
          </table:table-cell>
          <table:table-cell office:value-type="string" table:style-name="ce142">
            <text:p>Activity Analytics (Growthbook + SA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3"/>
        </table:table-row>
        <table:table-row table:style-name="ro20">
          <table:table-cell table:number-columns-repeated="2"/>
          <table:table-cell office:value-type="float" office:value="3" table:style-name="ce155">
            <text:p>3</text:p>
          </table:table-cell>
          <table:table-cell office:value-type="string" table:style-name="ce142">
            <text:p>Pricing, Policy &amp; Scheme Dissemination Chatbot</text:p>
          </table:table-cell>
          <table:table-cell office:value-type="string" table:style-name="ce120">
            <text:p>•<text:s/><text:span text:style-name="T2">Centralized way to track and publish product related schemes<text:s/></text:span>to make it easily accessible to all field force (RBMs/ TBMs)</text:p>
            <text:p>• LLM-based query tool that makes the latest<text:s/><text:span text:style-name="T2">product pricing, trade schemes, credit policy and commercial terms instantly accessible to field teams</text:span></text:p>
            <text:p>•<text:s/><text:span text:style-name="T2">Consistent and timely communication<text:s/></text:span>of product wise scheme changes across all TBMs/RBMs<text:s/></text:p>
          </table:table-cell>
          <table:table-cell office:value-type="string" table:style-name="ce131">
            <text:p>•<text:s/><text:span text:style-name="T2">Pricing and scheme updates circulate through WhatsApp groups</text:span>, email circulars and PDF attachments</text:p>
            <text:p>•<text:s/><text:span text:style-name="T2">TBMs call RBMs or HO stakeholders to confirm 'latest applicable scheme'<text:s/></text:span>before quoting to dealer/ for any confusion</text:p>
            <text:p>•<text:s/><text:span text:style-name="T2">Some instances of field staff misquoting schemes<text:s/></text:span>due to lack of complete information leading to reduced trust in dealers</text:p>
            <text:p>•<text:s/><text:span text:style-name="T2">Channel partners quoted major difficulties in locating multiple PDF files<text:s/></text:span>across products impacting overall experience</text:p>
            <text:p>• TBMs make dealer commitments based on potentially outdated schemes</text:p>
            <text:p>•<text:s/><text:span text:style-name="T2">No single source of truth<text:s/></text:span>— potential for same scheme interpreted differently by different TBMs</text:p>
          </table:table-cell>
          <table:table-cell office:value-type="string" table:style-name="ce131">
            <text:p><text:span text:style-name="T2">Data gaps:</text:span></text:p>
            <text:p>•<text:s/><text:span text:style-name="T2">Circulars not structured or available centrally<text:s/></text:span>— PDFs, images, WhatsApp forwards; no searchable index</text:p>
            <text:p>•<text:s/><text:span text:style-name="T2">Scheme eligibility logic<text:s/></text:span>(product × region × dealer tier × period) not codified and available from a system</text:p>
            <text:p><text:span text:style-name="T2"/></text:p>
            <text:p><text:span text:style-name="T2">Tool fragmentation:</text:span></text:p>
            <text:p>• WhatsApp + email + PDF library + SAP pricing master — no unified query surface</text:p>
          </table:table-cell>
          <table:table-cell office:value-type="string" table:style-name="ce132">
            <text:p>•<text:s/><text:span text:style-name="T2">All schemes are maintained and tracked centrally<text:s/></text:span></text:p>
            <text:p>• RBM/ TBM asks to a chatbot: 'Current scheme on Shriram Super 303 wheat seed 10-kg pack for Haryana dealers this month?' → bot returns active scheme with start/end date, eligibility, linked circular PDF</text:p>
            <text:p>•<text:s/><text:span text:style-name="T2">Bot proactively pushes 'scheme expiring in 3 days' alerts</text:span><text:s/>to TBMs with dealers who haven't yet participated</text:p>
            <text:p>•<text:s/><text:span text:style-name="T2">Conflicting or obsolete scheme references are flagged</text:span>; bot asks for clarification before answering ambiguous queries</text:p>
            <text:p>•<text:s/><text:span text:style-name="T2">Full query log retained<text:s/></text:span>— gives Commercial team visibility into which schemes are unclear or under-adopted</text:p>
          </table:table-cell>
          <table:table-cell office:value-type="string" table:style-name="ce120">
            <text:p>•<text:s/><text:span text:style-name="T2">Eliminates dealer disputes from misquoted schemes</text:span><text:s/>— direct saving in credit notes and goodwill write-offs</text:p>
            <text:p>•<text:s/><text:span text:style-name="T2">Frees up RBM/HO time<text:s/></text:span>currently spent answering TBM queries<text:s/></text:p>
            <text:p>•<text:s/><text:span text:style-name="T2">Improves scheme uptake<text:s/></text:span>— alerts drive incremental participation on time-bound schemes</text:p>
            <text:p>•<text:s/><text:span text:style-name="T2">Enables new TBMs to ramp faster without memorizing scheme matrices and prevents loss of information</text:span></text:p>
          </table:table-cell>
          <table:covered-table-cell/>
          <table:covered-table-cell/>
          <table:table-cell office:value-type="string" table:style-name="ce25">
            <text:p><text:span text:style-name="T2">Design:</text:span></text:p>
            <text:p>• Scheme taxonomy and eligibility rule framework designed with Commercial team</text:p>
            <text:p>• Intent library for top scheme/pricing queries<text:s/></text:p>
            <text:p>• Conflict resolution UX — how the bot handles overlapping or superseded schemes</text:p>
            <text:p><text:span text:style-name="T2"/></text:p>
            <text:p><text:span text:style-name="T2">Development:</text:span></text:p>
            <text:p>• Document ingestion pipeline (OCR for image circulars) + vector store</text:p>
            <text:p>• RAG chain over circular repository + structured scheme database</text:p>
            <text:p>• LLM query handling with transliteration + intent classification</text:p>
            <text:p>• Customer master integration for push alerts</text:p>
            <text:p><text:span text:style-name="T2"/></text:p>
            <text:p><text:span text:style-name="T2">Data:</text:span></text:p>
            <text:p>• Historical circulars (PDFs, WhatsApp exports, email archives)<text:s/></text:p>
            <text:p>• SAP pricing master with effective date logic</text:p>
            <text:p>• Customer/ Dealer master with tier, region, scheme eligibility tags</text:p>
          </table:table-cell>
          <table:covered-table-cell/>
          <table:table-cell office:value-type="string" table:style-name="ce30">
            <text:p>15-20% allocation</text:p>
          </table:table-cell>
          <table:covered-table-cell/>
          <table:covered-table-cell/>
          <table:table-cell table:number-columns-repeated="16368" table:style-name="ce3"/>
        </table:table-row>
        <table:table-row table:style-name="ro21">
          <table:table-cell table:number-columns-repeated="2"/>
          <table:table-cell office:value-type="float" office:value="4" table:style-name="ce155">
            <text:p>4</text:p>
          </table:table-cell>
          <table:table-cell office:value-type="string" table:style-name="ce142">
            <text:p>Dealer Profiles &amp; Field-Visit Conversation Inputs</text:p>
            <text:p>(Saathi app)</text:p>
          </table:table-cell>
          <table:table-cell office:value-type="string" table:style-name="ce120">
            <text:p>•<text:s/><text:span text:style-name="T2">LLM-based tool that delivers a 360° dealer brief<text:s/></text:span>— historical sales, outstanding receivables, scheme participation, last-visit notes, recent issues — ahead of every TBM visit</text:p>
            <text:p>•<text:span text:style-name="T2"><text:s/>Handheld voice device</text:span><text:s/>(eg: Neosapien) for recording all conversations in the field and answering basic queries (eg: dealer profile) to the user</text:p>
            <text:p>• Front-end app/ web-portal (as per tech feasibility) to<text:s/><text:span text:style-name="T2">provide a list of questions/ script for the TBM/ RBM to speak with the dealer</text:span></text:p>
            <text:p>•<text:s/><text:span text:style-name="T2">Accepts follow-up questions<text:s/></text:span>('Analyse the pattern of seeds purchase throughout the year for Vendor X?') and returns contextual answers from SAP history and dealer visit log and notes</text:p>
            <text:p>• Supports in journey and route planning for each field agent</text:p>
            <text:p>• Leverages the recorded conversations (with relevant security checks in place)<text:s/><text:span text:style-name="T2">and generates meetings summary, insights and feeds as data points for next steps</text:span></text:p>
          </table:table-cell>
          <table:table-cell office:value-type="string" table:style-name="ce131">
            <text:p>•<text:s/><text:span text:style-name="T2">No structured system driven prep material<text:s/></text:span>for any dealer conversation TBMs <text:s/>- manual effort required to collate data points<text:s/></text:p>
            <text:p>•<text:s/><text:span text:style-name="T2">Dealer history exists in SAP (transactional) but is not summarized or query able</text:span></text:p>
            <text:p>•<text:s/><text:span text:style-name="T2">Dealer visit notes<text:s/></text:span>stored in an unstructured way via emails/ excels - risking loss of information once a TBM/ RBM exits</text:p>
            <text:p>•<text:s/><text:span text:style-name="T2">Need for more strategic conversations with dealers focused on increasing wallet share<text:s/></text:span></text:p>
            <text:p>• Data backed insight generation across dealers is manual; TBM can't easily see that 'dealer X matches the profile of dealer Y where we grew 40%'</text:p>
          </table:table-cell>
          <table:table-cell office:value-type="string" table:style-name="ce39">
            <text:p><text:span text:style-name="T2">Data gaps:</text:span></text:p>
            <text:p>• Dealer profile synthesized across SAP (sales, receivables), and dealer visit notes — but nowhere unified</text:p>
            <text:p>• Field-visit conversations not captured structurally — insights lost between visits</text:p>
            <text:p/>
            <text:p><text:span text:style-name="T2"/></text:p>
            <text:p><text:span text:style-name="T2">Tool Fragmentation:</text:span></text:p>
            <text:p>• No centralized tool exists, TBM/ RBMs rely on information generated via SAP data before the meeting/ calling up relevant stakeholders for real-time information (eg: influential or big farmers)</text:p>
          </table:table-cell>
          <table:table-cell office:value-type="string" table:style-name="ce25">
            <text:p>•<text:s/><text:span text:style-name="T2">Before visit</text:span>: TBM opens dealer profile <text:s/>→ sees 1-page brief with headline metrics, 3 recommended talking points ('Push SPN — scheme ending in 10 days, his pincode has low penetration'), last-visit action items status</text:p>
            <text:p>•<text:s/><text:span text:style-name="T2">During visit:</text:span><text:s/>Voice-note capture of conversation → auto-structured into a central database with tagged action items</text:p>
            <text:p>•<text:s/><text:span text:style-name="T2">Post-visit</text:span>: follow-up prompts and action items scheduled automatically based on commitments made in the conversation; to be shown on the front-end display (app/ web-portal)</text:p>
            <text:p>•<text:s/><text:span text:style-name="T2">Query based resolution</text:span>: 'Show me 3 dealers in my territory with a similar vegetable seed profile to Dealer X' → gets peer list with performance comparison</text:p>
          </table:table-cell>
          <table:table-cell office:value-type="string" table:style-name="ce120">
            <text:p>•<text:s/><text:span text:style-name="T2">Conversion quality of dealer visits increases</text:span><text:s/>— each visit drives explicit next-step commitments tracked to closure</text:p>
            <text:p>•<text:s/><text:span text:style-name="T2">TBM prep time per visit drops</text:span><text:s/>from 30-45 min (when done) to 5 min; drives more visits per week</text:p>
            <text:p>•<text:s/><text:span text:style-name="T2">Institutional dealer knowledge retained across TBM transfers</text:span><text:s/>— time taken for onboarding new TBM to a territory drops<text:s/></text:p>
          </table:table-cell>
          <table:covered-table-cell/>
          <table:covered-table-cell/>
          <table:table-cell office:value-type="string" table:style-name="ce25">
            <text:p><text:span text:style-name="T2">Data:</text:span></text:p>
            <text:p>• SAP dealer master, sales, collections, credit notes, outstanding (2-year history)</text:p>
            <text:p>• Dealer visit logs and free-text field notes</text:p>
            <text:p>• Scheme participation history and commercial disputes log</text:p>
            <text:p/>
            <text:p><text:span text:style-name="T2">Design:</text:span></text:p>
            <text:p>• Dealer brief layout — headline KPIs, recommended talking points, visit objectives</text:p>
            <text:p>• Voice-capture UX and structured tagging taxonomy for visit conversations</text:p>
            <text:p>• Peer-comparison algorithm: what defines a 'similar dealer' (geography, SKU mix, scale, tier)</text:p>
            <text:p/>
            <text:p><text:span text:style-name="T2">Development:</text:span></text:p>
            <text:p>• Dealer feature store built on SAP + Growthbook</text:p>
            <text:p>• Speech-to-text (multi-lingual) for visit notes</text:p>
            <text:p>• RAG chain for follow-up Q&amp;A grounded in dealer data</text:p>
            <text:p>• Recommendation engine for talking points per visit</text:p>
          </table:table-cell>
          <table:covered-table-cell/>
          <table:table-cell office:value-type="string" table:style-name="ce30">
            <text:p>25-30% allocation</text:p>
          </table:table-cell>
          <table:covered-table-cell/>
          <table:covered-table-cell/>
          <table:table-cell table:number-columns-repeated="16368"/>
        </table:table-row>
        <table:table-row table:style-name="ro22">
          <table:table-cell table:number-columns-repeated="2"/>
          <table:table-cell office:value-type="float" office:value="5" table:style-name="ce155">
            <text:p>5</text:p>
          </table:table-cell>
          <table:table-cell office:value-type="string" table:style-name="ce143">
            <text:p>AI-Enabled Sales Coaching</text:p>
          </table:table-cell>
          <table:table-cell office:value-type="string" table:style-name="ce61">
            <text:p>•<text:s/><text:span text:style-name="T2">Voice-enabled and vernacular AI coaching assistant for Salesforce and MGOs<text:s/></text:span>— supports roleplay practice for dealer/farmer conversations, pre-meeting prep briefs, and on-demand product expertise</text:p>
            <text:p>•<text:s/><text:span text:style-name="T2">Conduct mock conversations along with scoring of preparedness<text:s/></text:span>based on responses and product awareness along with replays</text:p>
            <text:p/>
          </table:table-cell>
          <table:table-cell office:value-type="string" table:style-name="ce131">
            <text:p>• MGO training happens through classroom sessions, limited ByteEdge modules and ride-along with TBMs —<text:s/><text:span text:style-name="T2">scalable only to a point given 800+ MGOs and high attrition</text:span></text:p>
            <text:p>•<text:s/><text:span text:style-name="T2">New MGO/ TBM takes significant months to ramp-up</text:span>; product depth varies wildly across the field force since almost all come from a single BU experience (seeds, SPN or CP)</text:p>
            <text:p>• High-value conversations where product needs to be pitched along with its benefits (e.g., pitching a new SPN product to a skeptical farmer)<text:s/><text:span text:style-name="T2">get practiced only in real customer interactions</text:span><text:s/>— expensive learning</text:p>
            <text:p>•<text:s/><text:span text:style-name="T2">MGO focus limited on product USPs highlighted by TBMs/ RBMs<text:s/></text:span></text:p>
            <text:p><text:span text:style-name="T2">• MGOs walk into tough conversations unprepared;<text:s/></text:span>loss aversion becomes loss of deal<text:span text:style-name="T2"/></text:p>
            <text:p><text:span text:style-name="T2">• No way for MGOs to self-diagnose gaps<text:s/></text:span>between their pitch and a best-practice pitch</text:p>
          </table:table-cell>
          <table:table-cell office:value-type="string" table:style-name="ce131">
            <text:p><text:span text:style-name="T2">Data gaps:</text:span></text:p>
            <text:p>• Product FAQs, objection handling, case studies scattered across different material <text:s/>(primarily for high value products)</text:p>
            <text:p/>
            <text:p><text:span text:style-name="T2">Tool fragmentation:</text:span></text:p>
            <text:p>• ByteEdge (async modules) + classroom + ride-along + WhatsApp Q&amp;A — no always-on support during actual field time</text:p>
          </table:table-cell>
          <table:table-cell office:value-type="string" table:style-name="ce25">
            <text:p>•<text:s/><text:span text:style-name="T2">MGO en route to a farmer meeting:</text:span><text:s/>invokes Sales coaching assistant→ 'Prep me for pitching Shriram Super wheat seed to 30 small-holder farmers in rabi season' →<text:s/><text:span text:style-name="T2">gets 3-minute audio brief covering product, top 3 objections, local competitive context</text:span></text:p>
            <text:p>•<text:s/><text:span text:style-name="T2">Post-meeting: records a 60-second roleplay of the pitch → assistant gives specific feedback<text:s/></text:span>('You covered yield but not seed treatment — farmers usually ask about that here')</text:p>
            <text:p>•<text:s/><text:span text:style-name="T2">Internal employee training:</text:span><text:s/>MGOs take part in basic soft skill trainings to upskill themselves<text:s/></text:p>
            <text:p>•<text:s/><text:span text:style-name="T2">For technical product queries mid-conversation:<text:s/></text:span>MGO steps aside, asks voice query, gets answer grounded in SFS product literature with citation</text:p>
          </table:table-cell>
          <table:table-cell office:value-type="string" table:style-name="ce120">
            <text:p>•<text:s/><text:span text:style-name="T2">Ramp time for new MGO:</text:span><text:s/>Reduced significantly<text:s/></text:p>
            <text:p>•<text:span text:style-name="T2"><text:s/>Consistency of product pitch across MGO base</text:span><text:s/>— reduces farmer complaints from misinformation</text:p>
            <text:p>•<text:s/><text:span text:style-name="T2">Increased selling of value based products<text:s/></text:span>- which are higher priced but gives considerable benefits to the farmers. Ability for MGO to articulate the benefits increase</text:p>
            <text:p>•<text:s/><text:span text:style-name="T2">Scales institutional field wisdom beyond what classroom training can reach</text:span></text:p>
          </table:table-cell>
          <table:covered-table-cell/>
          <table:covered-table-cell/>
          <table:table-cell office:value-type="string" table:style-name="ce25">
            <text:p><text:span text:style-name="T2">Data:</text:span></text:p>
            <text:p>•<text:s/><text:span text:style-name="T2">Product technical literature,<text:s/></text:span>safety data sheets, agronomic guides (Seeds, CP, SPN)</text:p>
            <text:p>• Historical farmer/dealer objections collected via field surveys + Growthbook notes</text:p>
            <text:p>•<text:s/><text:span text:style-name="T2">Best-practice pitch recordings from senior MGOs<text:s/></text:span>(opt-in, 100+ per product category)</text:p>
            <text:p><text:span text:style-name="T2"/></text:p>
            <text:p><text:span text:style-name="T2">Design:</text:span></text:p>
            <text:p>• Voice UX for coaching device</text:p>
            <text:p>• Coaching feedback rubric — what dimensions the assistant evaluates (coverage, clarity, objection handling)</text:p>
            <text:p>• Roleplay scenario library covering multiple conversation types</text:p>
          </table:table-cell>
          <table:covered-table-cell/>
          <table:table-cell office:value-type="string" table:style-name="ce30">
            <text:p>15-20% allocation</text:p>
          </table:table-cell>
          <table:covered-table-cell/>
          <table:covered-table-cell/>
          <table:table-cell table:number-columns-repeated="16368"/>
        </table:table-row>
        <table:table-row table:style-name="ro23">
          <table:table-cell table:number-columns-repeated="2"/>
          <table:table-cell office:value-type="float" office:value="6" table:style-name="ce155">
            <text:p>6</text:p>
          </table:table-cell>
          <table:table-cell office:value-type="string" table:style-name="ce142">
            <text:p>Unified Product &amp; Partner-Level Visibility</text:p>
          </table:table-cell>
          <table:table-cell office:value-type="string" table:style-name="ce120">
            <text:p>•<text:s/><text:span text:style-name="T2">Consolidated dashboard integrating product master</text:span>,<text:span text:style-name="T2"><text:s/>sales, collections, liquidation</text:span><text:s/>(based on field force inputs) and targets at channel partner level</text:p>
            <text:p>•<text:span text:style-name="T2"><text:s/>Gives leadership one view across all dealers</text:span>, distributors and regions — with drill-down from national to individual partner</text:p>
          </table:table-cell>
          <table:table-cell office:value-type="string" table:style-name="ce131">
            <text:p>• Product-level, partner-level and target data sit in separate SAP reports;<text:s/><text:span text:style-name="T2">stitched together in Excel for reviews</text:span></text:p>
            <text:p>• TBMs/RBMs have no way to<text:s/><text:span text:style-name="T2">see all the dealers tagged to them and do any kind of analytics<text:s/></text:span></text:p>
            <text:p>• Monthly leadership reviews<text:s/><text:span text:style-name="T2">consumes a lot of bandwidth<text:s/></text:span>to make desired reports and analysis</text:p>
            <text:p>•<text:s/><text:span text:style-name="T2">Imbalanced partner portfolios invisible</text:span><text:s/>— TBMs may have 5 high-performing dealers and 20 underperformers but no diagnostic view</text:p>
            <text:p>•<text:s/><text:span text:style-name="T2">Product-mix gaps</text:span><text:s/>(partners selling only Seeds or only CP) not surfaced systematically</text:p>
          </table:table-cell>
          <table:table-cell office:value-type="string" table:style-name="ce131">
            <text:p><text:span text:style-name="T2">Data gaps:</text:span></text:p>
            <text:p>• SAP has the data but not the analytical views; targets, actuals and collections never sit in one central database/ dashboard</text:p>
            <text:p>• No standard partner scorecard across regions</text:p>
            <text:p>• PoG data for inventory liquidation</text:p>
            <text:p><text:span text:style-name="T2"/></text:p>
            <text:p><text:span text:style-name="T2">Tool fragmentation:</text:span></text:p>
            <text:p>• Multiple SAP tables + Excel templates across regions</text:p>
          </table:table-cell>
          <table:table-cell office:value-type="string" table:style-name="ce25">
            <text:p>• Leadership opens the dashboard →<text:s/><text:span text:style-name="T2">sees national view: product mix depth by region, target vs. actual by category, collections ageing heat-map</text:span></text:p>
            <text:p>• Drill down to RBM → TBM → dealer ; each level shows partner-ranked scorecard</text:p>
            <text:p>•<text:s/><text:span text:style-name="T2">Automated partner classification<text:s/></text:span>(star, growth, maintain, turnaround) with suggested next action</text:p>
            <text:p>• Monthly review materials auto-generated from the dashboard — analyst team redeployed to insight work</text:p>
          </table:table-cell>
          <table:table-cell office:value-type="string" table:style-name="ce120">
            <text:p>•<text:s/><text:span text:style-name="T2">Saves employee bandwidth<text:s/></text:span>for report assembly effort</text:p>
            <text:p>•<text:s/><text:span text:style-name="T2">Surfaces product-mix gaps</text:span><text:s/>→ drives cross-sell uplift from underpenetrated partner cohorts</text:p>
            <text:p>•<text:s/><text:span text:style-name="T2">Enables consistent partner scorecard</text:span><text:s/>across regions — fairer incentive calibration and review</text:p>
          </table:table-cell>
          <table:covered-table-cell/>
          <table:covered-table-cell/>
          <table:table-cell office:value-type="string" table:style-name="ce25">
            <text:p><text:span text:style-name="T2">Data:</text:span></text:p>
            <text:p>• SAP product master, customer master, sales, collections, targets</text:p>
            <text:p/>
            <text:p><text:span text:style-name="T2">Design:</text:span></text:p>
            <text:p>• Customer/ partner scorecard methodology and classification rules</text:p>
            <text:p>• Dashboard navigation — national → regional → TBM → partner drill path</text:p>
            <text:p/>
            <text:p><text:span text:style-name="T2">Development:</text:span></text:p>
            <text:p>• Data model consolidation and semantic layer</text:p>
            <text:p>• Dashboard build with drill hierarchy</text:p>
            <text:p>• Customer/ Partner classification engine</text:p>
            <text:p/>
          </table:table-cell>
          <table:covered-table-cell/>
          <table:table-cell office:value-type="string" table:style-name="ce30">
            <text:p>10-15% allocation</text:p>
          </table:table-cell>
          <table:covered-table-cell/>
          <table:covered-table-cell/>
          <table:table-cell table:number-columns-repeated="16368"/>
        </table:table-row>
        <table:table-row table:style-name="ro24">
          <table:table-cell table:number-columns-repeated="2"/>
          <table:table-cell office:value-type="float" office:value="7" table:style-name="ce156">
            <text:p>7</text:p>
          </table:table-cell>
          <table:table-cell office:value-type="string" table:style-name="ce146">
            <text:p>Real-Time Warehouse Stock Visibility</text:p>
          </table:table-cell>
          <table:table-cell office:value-type="string" table:style-name="ce120">
            <text:p><text:span text:style-name="T2">• Centralized system to collect and consolidate near</text:span><text:s/><text:span text:style-name="T2">real-time stock availability across SFS's own warehouses<text:s/></text:span>and vendor-managed locations (in a phased manner)</text:p>
            <text:p>•<text:s/><text:span text:style-name="T2">Access of information to TBMs/ RBMs<text:s/></text:span>which they can check before placing any customer order</text:p>
            <text:p>•<text:s/><text:span text:style-name="T2">External warehouse data collection largely managed by APIs created for vendor systems<text:s/></text:span>to fetch near real-time data<text:s/><text:span text:style-name="T3">(exact technical architecture to be deliberated and designed)</text:span><text:s/>-<text:s/><text:span text:style-name="T3">as per feasibility and acceptance by external vendors</text:span></text:p>
          </table:table-cell>
          <table:table-cell office:value-type="string" table:style-name="ce131">
            <text:p>• TBM takes an order from a dealer and<text:s/><text:span text:style-name="T2">calls the commercial officer to check stock availability</text:span></text:p>
            <text:p>• Stock is visible in SAP but not in a form TBMs can query from the field —<text:s/><text:span text:style-name="T2">plus vendor locations are not integrated. Stock-outs at specific warehouses not surfaced proactively</text:span></text:p>
            <text:p>•<text:s/><text:span text:style-name="T2">Order confirmation turnaround is higher</text:span>; potential for uncertainty in delivery timelines for dealers/ distributors<text:s/></text:p>
            <text:p>•<text:s/><text:span text:style-name="T2">TBM cannot offer alternatives in real time<text:s/></text:span>('We're out of 10kg SKU but 25kg is in the next warehouse') — order lost or delayed</text:p>
          </table:table-cell>
          <table:table-cell office:value-type="string" table:style-name="ce131">
            <text:p><text:span text:style-name="T2">Data gaps:</text:span></text:p>
            <text:p>• Real-time information on vendor warehouse stock</text:p>
            <text:p/>
            <text:p><text:span text:style-name="T2">Tool fragmentation:</text:span></text:p>
            <text:p>• SAP for own warehouse + manual updation of vendor stock in SAP by HO<text:s/></text:p>
            <text:p><text:span text:style-name="T8"/></text:p>
            <text:p><text:span text:style-name="T5">Tool absence:</text:span></text:p>
            <text:p><text:span text:style-name="T6">• Lack of a consolidated tool to provide real-time stock and inventory position to the TBM/RBM - critical in a dealer conversation<text:s/></text:span><text:span text:style-name="T11"/></text:p>
            <text:p/>
          </table:table-cell>
          <table:table-cell office:value-type="string" table:style-name="ce42">
            <text:p>•<text:s/><text:span text:style-name="T2">TBM opens stock check platform<text:s/></text:span>→ searches SKU → sees live stock across all own warehouses and connected vendor locations, plus in-transit stock to get full visibility<text:s/></text:p>
            <text:p>•<text:s/><text:span text:style-name="T2">Offers dealer alternatives on the spot</text:span>; confirms order with fulfilment commitment in real time</text:p>
            <text:p>•<text:s/><text:span text:style-name="T2">Low-stock alerts push to TBM for products his dealers typically buy<text:s/></text:span>— enables pre-emptive conversations</text:p>
            <text:p>•<text:s/><text:span text:style-name="T2">RO/commercial team removed from the order-confirmation loop<text:s/></text:span>— redirected to exception handling only<text:s/></text:p>
          </table:table-cell>
          <table:table-cell office:value-type="string" table:style-name="ce120">
            <text:p>• Enhances channel partner delight and overall experience by providing accurate and timely information<text:s/><text:span text:style-name="T2"/></text:p>
            <text:p>•<text:span text:style-name="T2"><text:s/>Order confirmation turnaround: Reduced significantly</text:span></text:p>
            <text:p>•<text:s/><text:span text:style-name="T2">Reduces lost orders from stock-out<text:s/></text:span></text:p>
            <text:p>• Enables same-visit cross-sell<text:s/><text:span text:style-name="T2">with live substitute product suggestions</text:span></text:p>
          </table:table-cell>
          <table:covered-table-cell/>
          <table:covered-table-cell/>
          <table:table-cell office:value-type="string" table:style-name="ce42">
            <text:p><text:span text:style-name="T2">Data:</text:span></text:p>
            <text:p>• SAP stock positions with scheduled near-real-time refresh<text:s/></text:p>
            <text:p>• Vendor warehouse feeds — API integration where available, scheduled CSV/Excel ingestion otherwise</text:p>
            <text:p>• In-transit data from Logistics system/ SAP</text:p>
            <text:p><text:span text:style-name="T2"/></text:p>
            <text:p><text:span text:style-name="T2">Design:</text:span></text:p>
            <text:p>• Stock check UX <text:s/>— search by SKU, substitute suggestions, location filter</text:p>
            <text:p>• Alerting rules for low-stock and stock-out scenarios</text:p>
            <text:p/>
            <text:p><text:span text:style-name="T2">Development:</text:span></text:p>
            <text:p>• Stock aggregation service across own + vendor sources with staleness indicators</text:p>
          </table:table-cell>
          <table:covered-table-cell/>
          <table:table-cell office:value-type="string" table:style-name="ce46">
            <text:p>15-20% allocation</text:p>
          </table:table-cell>
          <table:covered-table-cell/>
          <table:covered-table-cell/>
          <table:table-cell table:number-columns-repeated="16368"/>
        </table:table-row>
        <table:table-row table:style-name="ro25">
          <table:table-cell table:number-columns-repeated="2"/>
          <table:table-cell office:value-type="float" office:value="8" table:style-name="ce157">
            <text:p>8</text:p>
          </table:table-cell>
          <table:table-cell office:value-type="string" table:style-name="ce148">
            <text:p>Early Warning for Sales Performance &amp; Dealer Churn Risk</text:p>
          </table:table-cell>
          <table:table-cell office:value-type="string" table:style-name="ce120">
            <text:p>•<text:s/><text:span text:style-name="T2">Predictive model that flags dealers at risk of churn or materially reduced offtake</text:span>, using SAP sales trends, collection patterns and scheme participation</text:p>
            <text:p>•<text:s/><text:span text:style-name="T2">Risk scores refresh monthly with contributing-factor breakdown</text:span>; alerts route to the TBM and central finance team</text:p>
          </table:table-cell>
          <table:table-cell office:value-type="string" table:style-name="ce131">
            <text:p>• Dealer churn or decline detected post-facto <text:s/>— often too late to recover the account</text:p>
            <text:p>• Early signals (delayed payments, skipped schemes, drop in order frequency) exist in SAP but not monitored systematically</text:p>
            <text:p>• Finance team tracks receivable ageing and revenue — the two signals never combine until a dealer is already in distress</text:p>
            <text:p>• Reactive rather than proactive retention — TBM intervenes after the dealer has already started buying from competitor</text:p>
            <text:p>• No ranked 'watch list' of at-risk dealers guiding weekly TBM prioritisation+</text:p>
          </table:table-cell>
          <table:table-cell office:value-type="string" table:style-name="ce131">
            <text:p><text:span text:style-name="T2">Data and Analytics gaps:</text:span></text:p>
            <text:p>• Leading indicators (eg: order frequency change, scheme skip rate, product-mix narrowing) not analyzed and tracked proactively</text:p>
            <text:p>•<text:s/><text:span text:style-name="T2">No labelled churn history</text:span><text:s/>and standardized definition of churn (eg: no order for 90/180 days)<text:s/></text:p>
            <text:p>•<text:s/><text:span text:style-name="T2">No capture of rationale of churn/ corrective actions taken<text:s/></text:span>by TBM/ RBM</text:p>
          </table:table-cell>
          <table:table-cell office:value-type="string" table:style-name="ce67">
            <text:p>•<text:s/><text:span text:style-name="T2">Monthly refresh pushes a ranked at-risk dealer list to each TBM<text:s/></text:span>(top 10-15 for his territory) with risk score + top 3 contributing factors per dealer</text:p>
            <text:p>•<text:s/><text:span text:style-name="T2">Central finance gets a parallel view filtered by credit exposure</text:span><text:s/>— enables joint TBM + finance interventions for high-stakes accounts</text:p>
            <text:p>•<text:s/><text:span text:style-name="T2">TBM gets an alert from the centralized system -<text:s/></text:span>Changes in XX parameters for Dealer YY, probability of churn XX%</text:p>
            <text:p>Suggested corrective actions and interventions- XX, YY ZZ<text:s/><text:span text:style-name="T3">(model learns this as the data becomes more mature)</text:span></text:p>
            <text:p/>
          </table:table-cell>
          <table:table-cell office:value-type="string" table:style-name="ce120">
            <text:p>•<text:s/><text:span text:style-name="T2">Reduction in dealer churn<text:s/></text:span></text:p>
            <text:p>• Increased revenue per dealer</text:p>
            <text:p>•<text:s/><text:span text:style-name="T2">Credit risk reduction:<text:s/></text:span>finance intervenes early on payment-stretch signals — reduces receivable write-offs</text:p>
          </table:table-cell>
          <table:covered-table-cell/>
          <table:covered-table-cell/>
          <table:table-cell office:value-type="string" table:style-name="ce67">
            <text:p><text:span text:style-name="T2">Data:</text:span></text:p>
            <text:p>• SAP dealer sales history (3-year), collection patterns, scheme participation, product mix</text:p>
            <text:p>• Visit frequency and issue logs as additional features</text:p>
            <text:p>• External signals (where available): competitor activity in pincode, retail audit data</text:p>
            <text:p/>
            <text:p><text:span text:style-name="T2">Design:</text:span></text:p>
            <text:p>• Churn definition with Sales + Finance (thresholds, exclusion rules for seasonal dealers)</text:p>
            <text:p>• Feature engineering spec: offtake trend, collection delay, scheme skip, product concentration, visit gap</text:p>
            <text:p>• Intervention playbook — mapping risk archetype to suggested TBM action</text:p>
            <text:p/>
            <text:p><text:span text:style-name="T2">Development:</text:span></text:p>
            <text:p>• Historical dataset construction with churn labels back-tested over 2 years</text:p>
            <text:p>• Gradient boosted / ensemble model with SHAP-based factor attribution</text:p>
            <text:p>• Monthly refresh pipeline with model monitoring for drift</text:p>
            <text:p>• Alert routing to TBM (Growthbook) and finance (dashboard + email)</text:p>
          </table:table-cell>
          <table:covered-table-cell/>
          <table:table-cell office:value-type="string" table:style-name="ce72">
            <text:p>10-15% allocation</text:p>
          </table:table-cell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style-name="ce139"/>
          <table:table-cell table:style-name="ce147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style-name="ce3"/>
          <table:table-cell table:style-name="ce50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number-columns-repeated="16368"/>
        </table:table-row>
        <table:table-row table:style-name="ro2">
          <table:table-cell table:number-columns-repeated="2"/>
          <table:table-cell office:value-type="string" table:number-columns-spanned="7" table:number-rows-spanned="1" table:style-name="ce192">
            <text:p>ENTERPRISE ASSISTANT</text:p>
          </table:table-cell>
          <table:covered-table-cell table:number-columns-repeated="6"/>
          <table:table-cell table:style-name="ce75"/>
          <table:table-cell table:style-name="ce76"/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16368"/>
        </table:table-row>
        <table:table-row table:style-name="ro26">
          <table:table-cell table:number-columns-repeated="2"/>
          <table:table-cell office:value-type="float" office:value="1" table:style-name="ce158">
            <text:p>1</text:p>
          </table:table-cell>
          <table:table-cell office:value-type="string" table:style-name="ce164">
            <text:p>Enterprise Chat Assistant (Supply &amp; Sales)</text:p>
          </table:table-cell>
          <table:table-cell office:value-type="string" table:style-name="ce2">
            <text:p>•<text:s/><text:span text:style-name="T13">Chat-based enterprise assistant</text:span><text:s/>that answers complex cross-functional queries using curated enterprise data and<text:s/><text:span text:style-name="T13">standardized metrics</text:span><text:s/><text:span text:style-name="T13">for Supply and Sales data</text:span></text:p>
            <text:p>•<text:s/><text:span text:style-name="T13">Pre-defined intent library covers<text:s/></text:span>top leadership queries (e.g., 'Q3 collections vs. target by region', 'Gross margin trend for SPN vs. CP YTD') with drill-down and chart generation</text:p>
            <text:p>•<text:s/><text:span text:style-name="T13">Single one stop solution for all data related queries<text:s/></text:span>for the leadership with potential to be extended to the entire organization in the future<text:s/><text:span text:style-name="T14">(based on pre-defined roles and access)</text:span></text:p>
            <text:p>•<text:s/><text:span text:style-name="T13">To be extended to other data sets/ modules<text:s/></text:span>(eg: HR) in the future phases of implementation to make this comprehensive across the organization</text:p>
            <text:p/>
          </table:table-cell>
          <table:table-cell office:value-type="string" table:style-name="ce78">
            <text:p>• Leadership reviews rely on<text:s/><text:span text:style-name="T13">decks assembled manually</text:span><text:s/>by Finance team - takes significant bandwidth</text:p>
            <text:p>•<text:s/><text:span text:style-name="T13">Ad-hoc queries</text:span><text:s/>go through email chains, each answered by a different cut of the data post manual analysis</text:p>
            <text:p>•<text:s/><text:span text:style-name="T13">No single source of truth of key metrics/ KPIs across the organization</text:span><text:s/></text:p>
            <text:p>• Large part of leadership reviews go in getting the right data points vs.<text:s/><text:span text:style-name="T13">focusing on system generated actionable insights</text:span></text:p>
            <text:p>•<text:s/><text:span text:style-name="T13">Decisions delayed by the reporting cycle</text:span><text:s/>— leadership sees month-end numbers with a lag</text:p>
            <text:p>•<text:span text:style-name="T13"><text:s/>Cross-functional questions</text:span><text:s/>(e.g., 'how does collections delay link to product-mix by dealer tier?') require stitching 2-3 functional datasets manually</text:p>
          </table:table-cell>
          <table:table-cell office:value-type="string" table:style-name="ce79">
            <text:p><text:span text:style-name="T13">Data gaps:</text:span></text:p>
            <text:p>•<text:s/><text:span text:style-name="T13">No enterprise metrics dictionary</text:span><text:s/>— definitions drift across teams and over time</text:p>
            <text:p>• Data quality issues (missing dealer tagging, inconsistent product hierarchy, classification)</text:p>
            <text:p/>
            <text:p><text:span text:style-name="T13">Tool fragmentation:</text:span></text:p>
            <text:p>• Largely excel reports and analysis — no single conversational surface for leadership</text:p>
          </table:table-cell>
          <table:table-cell office:value-type="string" table:style-name="ce80">
            <text:p>• BH/CFO opens the Enterprise Assistant → asks in natural language: 'Show me Q3 collections vs. target for North region, split by product category' →<text:s/><text:span text:style-name="T13">receives answer with auto-generated chart and source citation promptly</text:span></text:p>
            <text:p>•<text:s/><text:span text:style-name="T13">Follow-up Q&amp;A in context</text:span>: 'Now show the same for last year; what's driving the gap?' — assistant maintains thread and returns causal hypotheses grounded in the data</text:p>
            <text:p>•<text:s/><text:span text:style-name="T13">Weekly 'what changed' digest</text:span><text:s/>pushed to leadership: top 5 metrics moving against trend, with drill-down links</text:p>
            <text:p>•<text:s/><text:span text:style-name="T13">Pre-defined reports for outliers and exceptions<text:s/></text:span>basis real time data analysis</text:p>
            <text:p>• Team bandwidth redeployed from recurring report assembly to<text:s/><text:span text:style-name="T13">insight and scenario work</text:span></text:p>
            <text:p>• All answers grounded in the enterprise metrics layer — leadership reviews start from a<text:s/><text:span text:style-name="T13">single shared definition</text:span><text:s/>of the numbers</text:p>
          </table:table-cell>
          <table:table-cell office:value-type="string" table:style-name="ce121">
            <text:p>• Monthly review preparation:<text:s/><text:span text:style-name="T13">3-5 days → &lt;half day</text:span><text:span text:style-name="T12"><text:s/>(review deck auto-generated from assistant queries)</text:span></text:p>
            <text:p><text:span text:style-name="T12">• Leadership time-to-answer on ad-hoc queries:<text:s/></text:span><text:span text:style-name="T13">hours/days → minutes</text:span><text:span text:style-name="T12"/></text:p>
            <text:p><text:span text:style-name="T12">• Recovers<text:s/></text:span><text:span text:style-name="T13">significant portion of team bandwidth</text:span><text:span text:style-name="T12"><text:s/>— redeployed to higher-value analysis</text:span></text:p>
            <text:p><text:span text:style-name="T12">•<text:s/></text:span><text:span text:style-name="T13">Eliminates KPI definition drift</text:span><text:span text:style-name="T12"><text:s/>across reviews — one number, one source, every time</text:span></text:p>
            <text:p><text:span text:style-name="T12">• Creates the<text:s/></text:span><text:span text:style-name="T13">foundation for future waves</text:span><text:span text:style-name="T12"><text:s/>— extending assistants to R&amp;D, Procurement, HR on the same reusable metrics + LLM stack</text:span></text:p>
          </table:table-cell>
          <table:table-cell office:value-type="string" table:style-name="ce67">
            <text:p><text:span text:style-name="T12">•<text:s/></text:span><text:span text:style-name="T13">Improved review effectiveness</text:span><text:span text:style-name="T12"><text:s/>through consistent, real-time insights</text:span></text:p>
          </table:table-cell>
          <table:table-cell office:value-type="string" table:style-name="ce81">
            <text:p>•<text:s/><text:span text:style-name="T13">Subsequent impact on financial metrics</text:span><text:s/>due to informed decisions</text:p>
          </table:table-cell>
          <table:table-cell office:value-type="string" table:style-name="ce80">
            <text:p><text:span text:style-name="T13">Data:</text:span></text:p>
            <text:p>• SAP extracts for Supply (Purchase register, GL, P&amp;L lines, working capital, receivables etc.) and Sales (primary/secondary sales, collections, targets, schemes)</text:p>
            <text:p>•<text:s/><text:span text:style-name="T13">Key enterprise metrics dictionary</text:span><text:s/>for review to be defined<text:s/></text:p>
            <text:p>• Historical decks and review materials as training data for intent library</text:p>
            <text:p/>
            <text:p><text:span text:style-name="T13">Design:</text:span></text:p>
            <text:p>• Intent library spec covering top leadership queries across Finance and Sales</text:p>
            <text:p>• Conversation UX including follow-up context handling, chart preferences, export to deck</text:p>
            <text:p>• Governance model: who can ask what, audit trail, data lineage surfacing</text:p>
            <text:p/>
            <text:p><text:span text:style-name="T13">Development:</text:span></text:p>
            <text:p>• Data pipeline from SAP BW + Power BI datasets into enterprise semantic layer</text:p>
            <text:p>• RAG chain grounded in metrics dictionary + data schema; text-to-SQL for structured queries</text:p>
            <text:p>• Chart auto-generation from query intents</text:p>
            <text:p>• Session and thread management for multi-turn dialogue</text:p>
          </table:table-cell>
          <table:table-cell office:value-type="string" table:style-name="ce82">
            <text:p>M+2/3 team for complete 4 months with staggered allocations</text:p>
            <text:p/>
            <text:p>(~50% allocation during design phase, tapering down to 20-30% by UAT/ rollout)</text:p>
          </table:table-cell>
          <table:table-cell office:value-type="string" table:style-name="ce72">
            <text:p>100% allocation</text:p>
          </table:table-cell>
          <table:table-cell office:value-type="string" table:style-name="ce83">
            <text:p>INR 2.5 Cr</text:p>
            <text:p>(at a solution level)</text:p>
          </table:table-cell>
          <table:table-cell office:value-type="string" table:style-name="ce84">
            <text:p>INR 3.0 Cr</text:p>
            <text:p>(at a solution level)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39"/>
          <table:table-cell table:style-name="ce147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style-name="ce3"/>
          <table:table-cell table:style-name="ce50"/>
          <table:table-cell table:number-columns-repeated="2" table:style-name="ce3"/>
          <table:table-cell table:style-name="ce50"/>
          <table:table-cell table:style-name="ce3"/>
          <table:table-cell table:style-name="ce50"/>
          <table:table-cell table:number-columns-repeated="16368"/>
        </table:table-row>
        <table:table-row table:style-name="ro1">
          <table:table-cell table:number-columns-repeated="2" table:style-name="ce86"/>
          <table:table-cell table:style-name="ce159"/>
          <table:table-cell table:style-name="ce149"/>
          <table:table-cell table:number-columns-repeated="2"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5"/>
          <table:table-cell table:number-columns-repeated="16368" table:style-name="ce86"/>
        </table:table-row>
        <table:table-row table:style-name="ro2">
          <table:table-cell table:number-columns-repeated="2" table:style-name="ce86"/>
          <table:table-cell office:value-type="string" table:style-name="ce163">
            <text:p>LOGISTICS - BUY AND CUSTOMIZE</text:p>
          </table:table-cell>
          <table:table-cell table:style-name="ce169"/>
          <table:table-cell table:number-columns-repeated="2"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5"/>
          <table:table-cell table:number-columns-repeated="16368" table:style-name="ce86"/>
        </table:table-row>
        <table:table-row table:style-name="ro27">
          <table:table-cell table:number-columns-repeated="2" table:style-name="ce86"/>
          <table:table-cell office:value-type="float" office:value="1" table:style-name="ce89">
            <text:p>1</text:p>
          </table:table-cell>
          <table:table-cell office:value-type="string" table:style-name="ce150">
            <text:p>Freight Price Discovery</text:p>
            <text:p>[Buy &amp; Customize]</text:p>
          </table:table-cell>
          <table:table-cell office:value-type="string" table:style-name="ce137">
            <text:p>•<text:s/><text:span text:style-name="T13">Consolidated freight pricing &amp; comparative analysis</text:span><text:s/>across multiple vendors, routes and lane-modes</text:p>
            <text:p>•<text:s/><text:span text:style-name="T13">Real-time market rate benchmarking with comparative analysis<text:s/></text:span>for route × lane × vehicle type</text:p>
            <text:p>• Availability of macro updates on commodity prices (eg: diesel, tolls) to facilitate data points for negotiation</text:p>
          </table:table-cell>
          <table:table-cell office:value-type="string" table:style-name="ce128">
            <text:p>•<text:s/><text:span text:style-name="T13">Freight rate discovery is manual</text:span><text:s/>— sourcing team collects quotes via email/phone from 3-4 vendors per lane, then compares<text:s/></text:p>
            <text:p>•<text:s/><text:span text:style-name="T13">Limited use of data-backed analytical tools</text:span><text:s/>for discovery of current freights and identification of optimum routes (e.g., direct vendor-to-dealer dispatch vs. warehouse routing)</text:p>
            <text:p>•<text:s/><text:span text:style-name="T13">No consolidated view of historical freight rates</text:span><text:s/>→ rate negotiations rest on memory and vendor-provided benchmarks</text:p>
            <text:p>•<text:s/><text:span text:style-name="T13">Combination of both long-term rate cards + spot prices<text:s/></text:span></text:p>
            <text:p>• Freight rates accepted without knowing market-clearing prices — overpayment on spot lanes</text:p>
            <text:p>•<text:s/><text:span text:style-name="T13">No real-time macro updates on commodity prices</text:span><text:s/>(diesel, tolls) feeding into rate decisions</text:p>
          </table:table-cell>
          <table:table-cell office:value-type="string" table:style-name="ce128">
            <text:p><text:span text:style-name="T13">Data and Analytics gaps:</text:span></text:p>
            <text:p>• No real-time macro &amp; competitive intelligence on freight market movements</text:p>
            <text:p>• Historical freight data not structured for trend analysis</text:p>
            <text:p/>
            <text:p><text:span text:style-name="T13">Tool fragmentation:</text:span></text:p>
            <text:p>• Email + Excel + vendor conversations — no integrated price discovery surface</text:p>
          </table:table-cell>
          <table:table-cell office:value-type="string" table:style-name="ce89">
            <text:p>• Supply chain manager enters lane + vehicle + volume →<text:s/><text:span text:style-name="T13">platform returns live market rates</text:span><text:s/>from multiple vendors + historical trend + vendor performance ratings</text:p>
            <text:p>• Automated<text:s/><text:span text:style-name="T13">Email/</text:span><text:s/><text:span text:style-name="T13">RFQ dispatch</text:span><text:s/>to pre-qualified vendors with response collation in one view</text:p>
            <text:p>•<text:s/><text:span text:style-name="T13">Weekly rate-movement alerts<text:s/></text:span>for contracted lanes — triggers renegotiation when market softens materially</text:p>
            <text:p>•<text:s/><text:span text:style-name="T13">Rate history and vendor performance<text:s/></text:span>captured per lane → feeds into annual vendor evaluation</text:p>
          </table:table-cell>
          <table:table-cell office:value-type="string" table:style-name="ce122">
            <text:p>•<text:s/><text:span text:style-name="T13">Freight cost savings<text:s/></text:span><text:span text:style-name="T12">by selection of best price and optimum vendor for the specific requirement<text:s/></text:span></text:p>
            <text:p><text:span text:style-name="T12">•<text:s/></text:span><text:span text:style-name="T13">Freight negotiation prep:<text:s/></text:span><text:span text:style-name="T12">hours → minutes; decisions data-backed vs. memory-driven</text:span></text:p>
            <text:p><text:span text:style-name="T12">•<text:s/></text:span><text:span text:style-name="T13">Spot/ Surface rate arbitrage opportunities<text:s/></text:span></text:p>
          </table:table-cell>
          <table:table-cell office:value-type="string" table:number-columns-spanned="1" table:number-rows-spanned="5" table:style-name="ce185">
            <text:p><text:span text:style-name="T12">•<text:s/></text:span><text:span text:style-name="T13">Reduction in the order-to-fulfilment cycle time</text:span><text:span text:style-name="T12"><text:s/>due to route/ network optimization</text:span></text:p>
            <text:p><text:span text:style-name="T12">•<text:s/></text:span><text:span text:style-name="T13">Increased customer delight</text:span><text:span text:style-name="T12"><text:s/>driven by transparency in information</text:span></text:p>
          </table:table-cell>
          <table:table-cell office:value-type="string" table:number-columns-spanned="1" table:number-rows-spanned="5" table:style-name="ce186">
            <text:p>•<text:s/><text:span text:style-name="T13">INR 1-2 Cr freight cost savings</text:span><text:s/>(5-7% on current addressable cost base of INR 12-14 Cr); will eventually increase with time</text:p>
            <text:p/>
            <text:p>• Additional working capital benefit from faster dealer payment cycle (via E-PoD) and better ocean ETA accuracy</text:p>
          </table:table-cell>
          <table:table-cell office:value-type="string" table:number-columns-spanned="1" table:number-rows-spanned="5" table:style-name="ce187">
            <text:p><text:span text:style-name="T13">Vendor selection &amp; evaluation (Primary focus):</text:span></text:p>
            <text:p>• Shortlist of candidates/ vendors providing full suite of transport management solutions with desired use cases and India focus depth eg: Freight Tiger, Shipsy, FarEye etc.<text:s/></text:p>
            <text:p>• Detailed conversations/ RFP across shortlisted candidates</text:p>
            <text:p>• Hands-on product evaluation — <text:s/>demos against the use cases using representative data</text:p>
            <text:p>• Commercial &amp; contract negotiation — pricing model (per-transaction vs. subscription), SLAs, data ownership, exit terms</text:p>
            <text:p/>
            <text:p><text:span text:style-name="T13">Data &amp; Integration:</text:span></text:p>
            <text:p>• SAP integration: master data (vendors, customers, SKUs, plants), transactional (orders, shipments, invoices, PoDs)</text:p>
            <text:p>• Master data harmonisation: route codes, vehicle types, lane definitions, freight rate structures</text:p>
            <text:p>• External data feeds: toll/diesel price indices, port congestion, carrier rate benchmarks</text:p>
            <text:p/>
            <text:p><text:span text:style-name="T13">Fit-gap &amp; Customization:</text:span></text:p>
            <text:p>• Functional fit-gap across the 5 use cases → customization scope per use case</text:p>
            <text:p>• Workflow configuration: RFQ-to-award, dispatch planning, E-PoD capture, consignment tracking, exception handling</text:p>
            <text:p>• UX adaptation for Indian road-logistics context (vernacular, offline-first driver app)</text:p>
            <text:p/>
            <text:p><text:span text:style-name="T13">Tools:</text:span></text:p>
            <text:p>• Selected vendor platform(s), SAP integration middleware, Azure for any custom layers</text:p>
          </table:table-cell>
          <table:table-cell office:value-type="string" table:number-columns-spanned="1" table:number-rows-spanned="5" table:style-name="ce188">
            <text:p><text:span text:style-name="T13">M+2 team for ~3 months with 20-30% allocation</text:span></text:p>
            <text:p/>
            <text:p>(Heavier allocation on vendor selection, fit-gap assessment and tech PMO vs. development)</text:p>
          </table:table-cell>
          <table:table-cell office:value-type="string" table:number-columns-spanned="1" table:number-rows-spanned="5" table:style-name="ce189">
            <text:p>100% allocation across all Use cases</text:p>
          </table:table-cell>
          <table:table-cell office:value-type="string" table:number-columns-spanned="1" table:number-rows-spanned="5" table:style-name="ce190">
            <text:p>INR 1.0 Cr</text:p>
            <text:p>(at a solution level)</text:p>
          </table:table-cell>
          <table:table-cell office:value-type="string" table:number-columns-spanned="1" table:number-rows-spanned="5" table:style-name="ce191">
            <text:p>INR 0.2 Cr</text:p>
            <text:p>(at a solution level)</text:p>
          </table:table-cell>
          <table:table-cell table:number-columns-repeated="16368" table:style-name="ce86"/>
        </table:table-row>
        <table:table-row table:style-name="ro28">
          <table:table-cell table:number-columns-repeated="2" table:style-name="ce86"/>
          <table:table-cell office:value-type="float" office:value="2" table:style-name="ce89">
            <text:p>2</text:p>
          </table:table-cell>
          <table:table-cell office:value-type="string" table:style-name="ce150">
            <text:p>Optimal Route &amp; Pickup/Drop Recommendation</text:p>
            <text:p>[Buy &amp; Customize]</text:p>
          </table:table-cell>
          <table:table-cell office:value-type="string" table:style-name="ce137">
            <text:p>•<text:s/><text:span text:style-name="T13">AI-driven route optimization</text:span><text:s/><text:span text:style-name="T13">recommending optimum pickup-drop sequencing across<text:s/></text:span>SFS storage locations, vendor warehouses and dealer delivery points</text:p>
            <text:p>• Factors real-time inventory levels, order priorities, vehicle capacity and traffic/seasonal conditions</text:p>
            <text:p/>
          </table:table-cell>
          <table:table-cell office:value-type="string" table:style-name="ce128">
            <text:p>•<text:s/><text:span text:style-name="T13">Routes decided by regional logistics coordinators</text:span><text:s/>based on experience — no optimization engine which makes it unclear on how much cost is being left on the table</text:p>
            <text:p>•<text:s/><text:span text:style-name="T13">Direct vendor-to-dealer dispatch vs. warehouse routing choice made manually case-by-case</text:span></text:p>
            <text:p>•<text:span text:style-name="T13"><text:s/>Vehicle capacity utilization often sub-optimal<text:s/></text:span>— partial loads dispatched because of scheduling constraints</text:p>
          </table:table-cell>
          <table:table-cell office:value-type="string" table:style-name="ce128">
            <text:p><text:span text:style-name="T13">Data and Analytics gaps:</text:span></text:p>
            <text:p>• Real-time inventory levels not tied into routing decisions</text:p>
            <text:p>• Historical delivery performance (on-time, cost) not analysed for route optimization</text:p>
            <text:p/>
            <text:p><text:span text:style-name="T13">Tool fragmentation:</text:span></text:p>
            <text:p>• SAP (inventory) + Excel (route plans) <text:s/>— no integrated routing</text:p>
          </table:table-cell>
          <table:table-cell office:value-type="string" table:style-name="ce89">
            <text:p>• Dispatch planner uploads day's orders →<text:s/><text:span text:style-name="T13">platform generates optimized route plans</text:span><text:s/>with vehicle loadings, sequence and expected cost</text:p>
            <text:p>• Recommends direct-dispatch vs. warehouse-routing per lane based on real-time inventory + cost comparison</text:p>
            <text:p>•<text:span text:style-name="T13"><text:s/>Post-delivery analytics:</text:span><text:s/>plan vs. actual for continuous optimization calibration</text:p>
          </table:table-cell>
          <table:table-cell office:value-type="string" table:style-name="ce90">
            <text:p>• Vehicle utilization uplift — fewer partial loads dispatched</text:p>
            <text:p>•<text:s/><text:span text:style-name="T13">Order-to-fulfilment cycle time reduction</text:span><text:span text:style-name="T12"><text:s/>via better route/network optimization</text:span></text:p>
            <text:p><text:span text:style-name="T12">• Lower kilometers-per-order drives operational cost and sustainability improvem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86"/>
        </table:table-row>
        <table:table-row table:style-name="ro29">
          <table:table-cell table:number-columns-repeated="2" table:style-name="ce86"/>
          <table:table-cell office:value-type="float" office:value="3" table:style-name="ce89">
            <text:p>3</text:p>
          </table:table-cell>
          <table:table-cell office:value-type="string" table:style-name="ce150">
            <text:p>E-Proof of Delivery (E-PoD) Execution</text:p>
            <text:p>[Buy &amp; Customize]</text:p>
          </table:table-cell>
          <table:table-cell office:value-type="string" table:style-name="ce137">
            <text:p>•<text:s/><text:span text:style-name="T13">Electronic replacement</text:span><text:s/>of the current manual paper-driven proof of delivery process</text:p>
            <text:p>• Driver/dealer digital signature + photo + geo-tag captured at delivery point;<text:s/><text:span text:style-name="T13">integration with SAP to update the information in real time<text:s/></text:span></text:p>
            <text:p>•<text:s/><text:span text:style-name="T13">To be linked with the existing QR codes</text:span><text:s/>put on each product to have a single source of information<text:s/><text:span text:style-name="T14">(feasibility to be evaluated)</text:span></text:p>
          </table:table-cell>
          <table:table-cell office:value-type="string" table:style-name="ce128">
            <text:p>•<text:s/><text:span text:style-name="T13">Physical paper PoDs</text:span><text:s/>signed at dealer location and then processed</text:p>
            <text:p>•<text:s/><text:span text:style-name="T13">Manual PoD process</text:span><text:s/>with lack of visibility on delivery confirmation due to physical PoDs<text:s/></text:p>
            <text:p>• No system driven data backed mechanism to provide dispute resolution quickly<text:s/></text:p>
            <text:p>• No real-time visibility to channel partners primarily large distributors on whether their order has been delivered</text:p>
          </table:table-cell>
          <table:table-cell office:value-type="string" table:style-name="ce138">
            <text:p><text:span text:style-name="T13">Data and Analytics gaps:</text:span></text:p>
            <text:p>• Photo evidence of condition at delivery not systematically captured → disputed claims hard to adjudicate</text:p>
            <text:p>• Linkage of product delivery/ update in SAP via existing product wise QR code</text:p>
            <text:p/>
            <text:p><text:span text:style-name="T13">Tool fragmentation:</text:span></text:p>
            <text:p>• Paper PoD + WhatsApp photos + phone confirmations + SAP entry</text:p>
          </table:table-cell>
          <table:table-cell office:value-type="string" table:style-name="ce87">
            <text:p><text:span text:style-name="T12">• Driver arrives at dealer → app captures<text:s/></text:span><text:span text:style-name="T13">geo-tag, dealer digital signature, condition photos</text:span><text:span text:style-name="T12"><text:s/>→ SAP updated in real time</text:span></text:p>
            <text:p><text:span text:style-name="T12">• Dealer receives delivery confirmation on WhatsApp/SMS with timestamp and photo evidence</text:span></text:p>
            <text:p><text:span text:style-name="T12">• Exceptions (partial delivery, damage) logged inline with photo evidence → routed to resolution workflow automatically</text:span></text:p>
            <text:p><text:span text:style-name="T12">• Invoice-to-PoD linkage automated → payment cycle shortens</text:span></text:p>
          </table:table-cell>
          <table:table-cell office:value-type="string" table:style-name="ce126">
            <text:p><text:span text:style-name="T12">•<text:s/></text:span><text:span text:style-name="T13">Order-to-fulfilment cycle time reduction</text:span><text:span text:style-name="T12"><text:s/>— PoD lag eliminated</text:span></text:p>
            <text:p><text:span text:style-name="T12">•<text:s/></text:span><text:span text:style-name="T13">Increased customer delight</text:span><text:span text:style-name="T12"><text:s/>driven by transparency in delivery confirmation</text:span></text:p>
            <text:p><text:span text:style-name="T12">• Dispute resolution: days → hours with structured evidence</text:span></text:p>
            <text:p><text:span text:style-name="T12">• Dealer payment cycle acceleration — working capital benefi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86"/>
        </table:table-row>
        <table:table-row table:style-name="ro30">
          <table:table-cell table:number-columns-repeated="2" table:style-name="ce86"/>
          <table:table-cell office:value-type="float" office:value="4" table:style-name="ce95">
            <text:p>4</text:p>
          </table:table-cell>
          <table:table-cell office:value-type="string" table:style-name="ce151">
            <text:p>Real-Time Consignment Monitoring</text:p>
            <text:p>[Buy &amp; Customize]</text:p>
          </table:table-cell>
          <table:table-cell office:value-type="string" table:style-name="ce137">
            <text:p>•<text:s/><text:span text:style-name="T13">Live shipment tracking</text:span><text:s/>providing real-time visibility of in-transit consignments to TBMs, RBMs and channel partners</text:p>
            <text:p>•<text:s/><text:span text:style-name="T13">GPS/cellular tracking integrated with order/invoice data<text:s/></text:span>— single view from order to delivery</text:p>
          </table:table-cell>
          <table:table-cell office:value-type="string" table:style-name="ce128">
            <text:p>•<text:s/><text:span text:style-name="T13">Shipment status tracked manually for different vendors</text:span>— no systematic visibility</text:p>
            <text:p>• No single source of truth for channel partners<text:s/><text:span text:style-name="T13">looking for a transparent information on delivery timelines</text:span></text:p>
            <text:p>• No early warning on delayed shipments — channel partners miss planning windows</text:p>
            <text:p>• Route deviations not detected in time to correct</text:p>
          </table:table-cell>
          <table:table-cell office:value-type="string" table:style-name="ce88">
            <text:p><text:span text:style-name="T13">Data gaps:</text:span></text:p>
            <text:p>• Shipment location data not captured systematically — no historical transit time baselines</text:p>
            <text:p>• No linkage between consignment tracking and compliance/license tracking</text:p>
          </table:table-cell>
          <table:table-cell office:value-type="string" table:style-name="ce87">
            <text:p><text:span text:style-name="T12">• TBM/dealer opens consignment tracker → sees<text:s/></text:span><text:span text:style-name="T13">live map with vehicle location, ETA and any exceptions</text:span><text:span text:style-name="T12"/></text:p>
            <text:p><text:span text:style-name="T12">• Proactive alerts to dealer on major delays; alerts to RO on route deviations</text:span></text:p>
            <text:p><text:span text:style-name="T12">• Transit time baselines built from historical tracking data — flags unusual delays automatically</text:span></text:p>
            <text:p><text:span text:style-name="T12">• Integration with compliance system surfaces any permit/license issues during transit</text:span></text:p>
          </table:table-cell>
          <table:table-cell office:value-type="string" table:style-name="ce122">
            <text:p>•<text:s/><text:span text:style-name="T13">Customer delight</text:span><text:span text:style-name="T12"><text:s/>via proactive visibility — dealers can plan receiving and onward distribution</text:span></text:p>
            <text:p><text:span text:style-name="T12">•<text:s/></text:span><text:span text:style-name="T13">RBM/ TBM bandwidth recovery</text:span><text:span text:style-name="T12"><text:s/>— time spent chasing driver vendors redeployed</text:span></text:p>
            <text:p><text:span text:style-name="T12">•</text:span><text:span text:style-name="T13"><text:s/>Fewer missed delivery windows</text:span><text:span text:style-name="T12"><text:s/>→ better dealer relationship and reduced write-offs on perishable SKUs</text:span></text:p>
            <text:p><text:span text:style-name="T12">• Data foundation for continuous transit time improvem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86"/>
        </table:table-row>
        <table:table-row table:style-name="ro31">
          <table:table-cell table:number-columns-repeated="2" table:style-name="ce86"/>
          <table:table-cell office:value-type="float" office:value="5" table:style-name="ce80">
            <text:p>5</text:p>
          </table:table-cell>
          <table:table-cell office:value-type="string" table:style-name="ce152">
            <text:p>Ocean Freight Tracking &amp; Optimization</text:p>
            <text:p>[Buy &amp; Customize]</text:p>
          </table:table-cell>
          <table:table-cell office:value-type="string" table:style-name="ce137">
            <text:p>•<text:s/><text:span text:style-name="T13">Optimized recommendations</text:span><text:s/>on carrier, route, and timing for ocean freight shipments (imports of raw materials, intermediates)</text:p>
            <text:p>•<text:s/><text:span text:style-name="T13">Multi-modal tracking from port of loading through inland delivery</text:span></text:p>
            <text:p/>
          </table:table-cell>
          <table:table-cell office:value-type="string" table:style-name="ce128">
            <text:p>•<text:s/><text:span text:style-name="T13">Ocean freight bookings made case-by-case</text:span><text:s/>with preferred forwarders — no systematic carrier/route optimization</text:p>
            <text:p>• Container tracking done via forwarder portals (each different) — consolidation into one view is manual</text:p>
            <text:p>•<text:s/><text:span text:style-name="T13">Lack of real-time macro intelligence</text:span><text:s/>on ocean freight market movements (rate, space, congestion)</text:p>
            <text:p>• Carrier/route selection not benchmarked — no systematic should-cost for ocean lanes</text:p>
            <text:p>• Booking timing decisions made without visibility on rate trend or space availability</text:p>
          </table:table-cell>
          <table:table-cell office:value-type="string" table:style-name="ce128">
            <text:p><text:span text:style-name="T13">Data gaps:</text:span></text:p>
            <text:p>• Container movement data fragmented across 4-5 forwarder portals</text:p>
            <text:p/>
            <text:p/>
            <text:p><text:span text:style-name="T13">Tool fragmentation:</text:span></text:p>
            <text:p>• Forwarder portals + email + Excel trackers<text:s/></text:p>
          </table:table-cell>
          <table:table-cell office:value-type="string" table:style-name="ce127">
            <text:p>• Procurement/logistics raises an import/ export request via sea/ocean→<text:s/><text:span text:style-name="T13">platform recommends optimum carrier + route + timing</text:span><text:s/>with rate benchmark</text:p>
            <text:p>•<text:s/><text:span text:style-name="T13">Container tracking unified across carriers</text:span><text:s/>— one dashboard for all in-transit imports</text:p>
            <text:p/>
          </table:table-cell>
          <table:table-cell office:value-type="string" table:style-name="ce122">
            <text:p>•<text:s/><text:span text:style-name="T13">Ocean freight rate optimization</text:span><text:span text:style-name="T12"><text:s/>— carrier/route benchmarking reveals savings opportunities</text:span></text:p>
            <text:p><text:span text:style-name="T12">• I</text:span><text:span text:style-name="T13">mport cycle time reduction via proactive exception handling</text:span><text:span text:style-name="T12"/></text:p>
            <text:p><text:span text:style-name="T12">• Working capital benefit from better ETA accuracy —<text:s/></text:span><text:span text:style-name="T13">production planning uses reliable inpu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8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63">
            <text:p>TECHNOLOGY &amp; INFRASTRUCTURE SETUP</text:p>
          </table:table-cell>
          <table:table-cell table:style-name="ce139"/>
          <table:table-cell table:number-columns-repeated="16380" table:style-name="ce3"/>
        </table:table-row>
        <table:table-row table:style-name="ro32">
          <table:table-cell table:number-columns-repeated="2"/>
          <table:table-cell office:value-type="float" office:value="1" table:style-name="ce160">
            <text:p>1</text:p>
          </table:table-cell>
          <table:table-cell office:value-type="string" table:style-name="ce153">
            <text:p>Technology and Infrastructure set-up</text:p>
          </table:table-cell>
          <table:table-cell office:value-type="string" table:style-name="ce129">
            <text:p><text:span text:style-name="T12">•<text:s/></text:span><text:span text:style-name="T13">Foundational cloud and infra backbone</text:span><text:span text:style-name="T12"><text:s/>enabling all AI solution builds to run in production — cloud infra, data platform, integration layer, shared GenAI services and platform operations</text:span></text:p>
            <text:p><text:span text:style-name="T12">•<text:s/></text:span><text:span text:style-name="T13">Centralized data lake combining data sets across multiple sources<text:s/></text:span><text:span text:style-name="T12">in a single place and making it easily referenceable by digital/ AI use-cases<text:s/></text:span></text:p>
            <text:p>• Set-up of API led enterprise integration layer</text:p>
          </table:table-cell>
          <table:table-cell office:value-type="string" table:style-name="ce128">
            <text:p>•<text:s/><text:span text:style-name="T13">No scalable cloud data platform</text:span><text:s/></text:p>
            <text:p>•<text:s/><text:span text:style-name="T13">Integration layer absent</text:span><text:s/>— SAP, Growthbook and external data sources accessed point-to-point per use case, with no shared APIs or governance</text:p>
            <text:p>•<text:s/><text:span text:style-name="T13">No shared GenAI platform</text:span><text:s/>— any GenAI work would fragment into siloed per-use-case builds with inconsistent guardrails</text:p>
            <text:p>•<text:s/><text:span text:style-name="T13">Data platform not curated for AI</text:span><text:s/>— consistent definitions, feature stores, vector DBs do not exist</text:p>
            <text:p>•<text:s/><text:span text:style-name="T13">No platform operating model</text:span><text:s/>— monitoring, observability, security and cost governance for AI workloads not defined</text:p>
          </table:table-cell>
          <table:table-cell office:value-type="string" table:style-name="ce128">
            <text:p><text:span text:style-name="T13">Data and Analytics gaps:</text:span></text:p>
            <text:p>• Data quality, lineage and governance not enforceable at the source — problems surface inside use cases rather than at the platform</text:p>
            <text:p>• No reusable feature stores or semantic layer → each team rebuilds from raw sources</text:p>
            <text:p/>
            <text:p><text:span text:style-name="T13">Tool absence:</text:span></text:p>
            <text:p>• Absent shared layers mean each use case team picks its own stack</text:p>
          </table:table-cell>
          <table:table-cell office:value-type="string" table:style-name="ce127">
            <text:p>•<text:s/><text:span text:style-name="T13">Scalable cloud infrastructure &amp; DevOps</text:span><text:s/>on Azure supporting iterative AI development, deployment and advanced workloads</text:p>
            <text:p>•<text:s/><text:span text:style-name="T13">Unified curated data platform</text:span><text:s/>(Lakehouse + Serving layer) providing consistent AI inputs and scalable processing<text:s/></text:p>
            <text:p>•<text:s/><text:span text:style-name="T13">API-led integration layer</text:span><text:s/>reliably connecting SAP, Growthbook and external data sources; reused by every use case<text:s/></text:p>
            <text:p>•<text:s/><text:span text:style-name="T13">Shared GenAI platform</text:span><text:s/>(LLM + RAG + guardrails) — avoids fragmented AI builds and enforces governance by default<text:s/></text:p>
            <text:p>•<text:s/><text:span text:style-name="T13">Platform operations model</text:span><text:s/>for go-live readiness, monitoring, maintenance and continuous tuning<text:s/></text:p>
            <text:p>• Use case development can begin in sandbox alongside these activities; full production integration requires platform completion as prerequisite</text:p>
          </table:table-cell>
          <table:table-cell office:value-type="string" table:style-name="ce127">
            <text:p>•<text:s/><text:span text:style-name="T13">Eliminates per-use-case infra rebuild</text:span><text:s/>— each new use case plugs into a shared platform vs. re-solving from scratch</text:p>
            <text:p>•<text:s/><text:span text:style-name="T13">Consistent governance by design</text:span><text:s/>— guardrails, observability, security applied platform-wide rather than per project</text:p>
            <text:p>•<text:s/><text:span text:style-name="T13">Time-to-production compressed</text:span><text:s/>for all subsequent waves — infra is a one-time cost, reuse is permanent</text:p>
            <text:p>•<text:s/><text:span text:style-name="T13">Compounding capability</text:span><text:s/>— later waves of use cases deploy in weeks not months once the platform is live</text:p>
            <text:p>• Future-ready backbone for extending AI to HR, Finance, Marketing and Manufacturing in later waves</text:p>
          </table:table-cell>
          <table:table-cell office:value-type="string" table:style-name="ce80">
            <text:p>•<text:s/><text:span text:style-name="T13">Foundation for the entire AI programme</text:span><text:s/>— enables every solution above to reach production</text:p>
            <text:p>• Shared platform eliminates fragmented per-use-case builds;<text:s/><text:span text:style-name="T13">compounding AI capability</text:span><text:s/>over time</text:p>
          </table:table-cell>
          <table:table-cell office:value-type="string" table:style-name="ce80">
            <text:p>•<text:s/><text:span text:style-name="T13">Enabler layer</text:span><text:s/>— financial impact realised through the use case benefits across different solution themes</text:p>
          </table:table-cell>
          <table:table-cell office:value-type="string" table:style-name="ce127">
            <text:p><text:span text:style-name="T13">Scalable cloud infrastructure &amp; DevOps:</text:span></text:p>
            <text:p>• Platform scope finalization</text:p>
            <text:p>• Azure subscription and billing setup</text:p>
            <text:p>• Production + dev/non-prod environment setup, GitHub</text:p>
            <text:p/>
            <text:p><text:span text:style-name="T13">Unified curated data platform:</text:span></text:p>
            <text:p>• Security governance config, data integration framework, SAP integration setup</text:p>
            <text:p>• Data storage (data lake) + processing capabilities</text:p>
            <text:p>• Data model / serving layer design</text:p>
            <text:p/>
            <text:p><text:span text:style-name="T13">API-led enterprise integration layer:</text:span></text:p>
            <text:p>• API architecture &amp; scope finalization</text:p>
            <text:p>• SAP and external system integration setup</text:p>
            <text:p>• Secure API management &amp; gateway enablement</text:p>
            <text:p/>
            <text:p><text:span text:style-name="T13">Shared GenAI platform with guardrails:</text:span></text:p>
            <text:p>• Platform enablement, shared GenAI services</text:p>
            <text:p>• Analytical tool workspace &amp; user access setup</text:p>
            <text:p/>
            <text:p><text:span text:style-name="T13">Platform operations, maintenance &amp; tuning:</text:span></text:p>
            <text:p>• Monitoring &amp; alerting, ops model &amp; runbooks</text:p>
            <text:p>• Platform go-live &amp; steady-state operation, enhancements &amp; tuning</text:p>
            <text:p/>
            <text:p><text:span text:style-name="T13">Ownership split:</text:span></text:p>
            <text:p>• Bain: project management, initiative alignment, progress tracking, de-bottlenecking, data template design, GenAI platform setup with guardrails</text:p>
            <text:p>• SFS: execution of alignment interventions with DCM Group IT (Data + Platform Engineers) and Tech Services Provider support</text:p>
          </table:table-cell>
          <table:table-cell office:value-type="string" table:style-name="ce82">
            <text:p><text:span text:style-name="T5">M+2/3 team for the entire duration of 6-7 months during initial set-up and ongoing PMO-oriented support post that</text:span></text:p>
            <text:p/>
            <text:p>(80-100% allocation in initial 1-2 months followed by 10-20% allocation for tech PMO + architecture oversight)</text:p>
          </table:table-cell>
          <table:table-cell office:value-type="string" table:style-name="ce77">
            <text:p>100% allocation of Azure data and integration engineers<text:s/></text:p>
          </table:table-cell>
          <table:table-cell office:value-type="string" table:style-name="ce113">
            <text:p>INR 2.0 Cr</text:p>
            <text:p/>
          </table:table-cell>
          <table:table-cell office:value-type="string" table:style-name="ce114">
            <text:p>-<text:s/></text:p>
            <text:p><text:span text:style-name="T4">(Cost of Azure Data &amp; integration Engineers along with license costs excluded from here)</text:span><text:span text:style-name="T5"/></text:p>
            <text:p/>
          </table:table-cell>
          <table:table-cell table:number-columns-repeated="16368"/>
        </table:table-row>
        <table:table-row table:number-rows-repeated="1048541" table:style-name="ro1">
          <table:table-cell table:number-columns-repeated="16384"/>
        </table:table-row>
        <table:named-expressions>
          <table:named-expression table:name="BtfeHeaderLastChanged" table:expression="of:=[Use_Case_Details.#REF!]" table:base-cell-address="Use_Case_List.$A$1"/>
          <table:named-expression table:name="BtfeHeaderSheetName" table:expression="of:=[Use_Case_Details.#REF!]" table:base-cell-address="Use_Case_List.$A$1"/>
          <table:named-expression table:name="BtfeHeaderWorkbookTitle" table:expression="of:=[Use_Case_Details.#REF!]" table:base-cell-address="Use_Case_Lis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 fo:font-size="11pt" style:font-size-asian="11pt" style:font-size-complex="11pt"/>
    </style:style>
    <style:style style:name="Comment" style:family="table-cell" style:data-style-name="N0">
      <style:table-cell-properties style:vertical-align="automatic" fo:background-color="transparent" style:cell-protect="none"/>
      <style:text-properties fo:color="#B4B4B4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B4CDC2"/>
      <style:text-properties fo:color="#007932"/>
    </style:style>
    <style:style style:name="Heading_32_1" style:display-name="Heading 1" style:family="table-cell" style:data-style-name="N0">
      <style:table-cell-properties fo:border-top="none" fo:border-bottom="thick solid #B4B4B4" fo:border-left="none" fo:border-right="none"/>
      <style:text-properties fo:color="#CC0000" fo:font-size="15pt" style:font-size-asian="15pt" style:font-size-complex="15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="thin solid #FFFFFF" style:vertical-align="middle" fo:background-color="#D6D6D6"/>
      <style:text-properties fo:font-weight="bold" style:font-weight-asian="bold" style:font-weight-complex="bold"/>
    </style:style>
    <style:style style:name="Heading_32_4" style:display-name="Heading 4" style:family="table-cell" style:data-style-name="N0">
      <style:table-cell-properties fo:border="thin solid #FFFFFF" style:vertical-align="middle" fo:background-color="#D6D6D6"/>
      <style:text-properties fo:font-weight="bold" style:font-weight-asian="bold" style:font-weight-complex="bold"/>
    </style:style>
    <style:style style:name="Input_58__32_Fact" style:display-name="Input: Fact" style:family="table-cell" style:data-style-name="N0">
      <style:table-cell-properties style:vertical-align="automatic" fo:background-color="#D9E6E0" style:cell-protect="none"/>
      <style:text-properties fo:color="#507867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otal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46647b" draw:opacity="100%" draw:stroke="none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Amit Saxena</meta:initial-creator>
    <dc:creator>Amit Saxena</dc:creator>
    <meta:creation-date>2026-05-13T09:09:54Z</meta:creation-date>
    <dc:date>2026-05-13T09:26:03Z</dc:date>
  </office:meta>
</office:document-meta>
</file>